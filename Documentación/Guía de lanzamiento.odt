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10000010668D1325B.png" manifest:media-type="image/png"/>
  <manifest:file-entry manifest:full-path="Pictures/10000000000001F4000000ACBD3B1C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51cm" fo:margin-left="0.002cm" fo:margin-top="0cm" fo:margin-bottom="0cm" table:align="left" style:writing-mode="page"/>
    </style:style>
    <style:style style:name="Tabla1.A" style:family="table-column">
      <style:table-column-properties style:column-width="0.704cm"/>
    </style:style>
    <style:style style:name="Tabla1.B" style:family="table-column">
      <style:table-column-properties style:column-width="4.586cm"/>
    </style:style>
    <style:style style:name="Tabla1.C" style:family="table-column">
      <style:table-column-properties style:column-width="11.2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1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1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2" style:family="table">
      <style:table-properties style:width="16.51cm" fo:margin-left="0.002cm" fo:margin-top="0cm" fo:margin-bottom="0cm" table:align="left" style:writing-mode="page"/>
    </style:style>
    <style:style style:name="Tabla2.A" style:family="table-column">
      <style:table-column-properties style:column-width="4.232cm"/>
    </style:style>
    <style:style style:name="Tabla2.B" style:family="table-column">
      <style:table-column-properties style:column-width="12.27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2.A2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2.A3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2.B3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12" style:family="table">
      <style:table-properties style:width="16.51cm" fo:margin-left="0.002cm" fo:margin-top="0cm" fo:margin-bottom="0cm" table:align="left" style:writing-mode="page"/>
    </style:style>
    <style:style style:name="Tabla12.A" style:family="table-column">
      <style:table-column-properties style:column-width="3.528cm"/>
    </style:style>
    <style:style style:name="Tabla12.B" style:family="table-column">
      <style:table-column-properties style:column-width="6.35cm"/>
    </style:style>
    <style:style style:name="Tabla12.C" style:family="table-column">
      <style:table-column-properties style:column-width="3.879cm"/>
    </style:style>
    <style:style style:name="Tabla12.D" style:family="table-column">
      <style:table-column-properties style:column-width="2.753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12.A2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12.A3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12.B3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12.C3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12.D3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13" style:family="table">
      <style:table-properties style:width="16.51cm" fo:margin-left="0.002cm" fo:margin-top="0cm" fo:margin-bottom="0cm" table:align="left" style:writing-mode="page"/>
    </style:style>
    <style:style style:name="Tabla13.A" style:family="table-column">
      <style:table-column-properties style:column-width="6.225cm"/>
    </style:style>
    <style:style style:name="Tabla13.B" style:family="table-column">
      <style:table-column-properties style:column-width="10.285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13.A2" style:family="table-cell">
      <style:table-cell-properties style:vertical-align="middle" fo:background-color="#ffffff" fo:padding-left="0.212cm" fo:padding-right="0.212cm" fo:padding-top="0.141cm" fo:padding-bottom="0.141cm" fo:border="0.1pt solid #cfd8dc">
        <style:background-image/>
      </style:table-cell-properties>
    </style:style>
    <style:style style:name="Tabla13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15" style:family="table">
      <style:table-properties style:width="16.51cm" fo:margin-left="0.002cm" fo:margin-top="0cm" fo:margin-bottom="0cm" table:align="left" style:writing-mode="page"/>
    </style:style>
    <style:style style:name="Tabla15.A" style:family="table-column">
      <style:table-column-properties style:column-width="2.469cm"/>
    </style:style>
    <style:style style:name="Tabla15.B" style:family="table-column">
      <style:table-column-properties style:column-width="3.526cm"/>
    </style:style>
    <style:style style:name="Tabla15.C" style:family="table-column">
      <style:table-column-properties style:column-width="3.882cm"/>
    </style:style>
    <style:style style:name="Tabla15.D" style:family="table-column">
      <style:table-column-properties style:column-width="6.632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1b5e20" fo:padding-left="0.212cm" fo:padding-right="0.212cm" fo:padding-top="0.141cm" fo:padding-bottom="0.141cm" fo:border="0.1pt solid #1b5e20">
        <style:background-image/>
      </style:table-cell-properties>
    </style:style>
    <style:style style:name="Tabla15.A2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15.B2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15.C2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15.D2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15.A3" style:family="table-cell">
      <style:table-cell-properties style:vertical-align="middle" fo:background-color="#e8f5e9" fo:padding-left="0.212cm" fo:padding-right="0.212cm" fo:padding-top="0.141cm" fo:padding-bottom="0.141cm" fo:border="0.1pt solid #cfd8dc">
        <style:background-image/>
      </style:table-cell-properties>
    </style:style>
    <style:style style:name="Tabla15.A4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15.B4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15.C4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Tabla15.D4" style:family="table-cell">
      <style:table-cell-properties style:vertical-align="middle" fo:padding-left="0.212cm" fo:padding-right="0.212cm" fo:padding-top="0.141cm" fo:padding-bottom="0.141cm" fo:border="0.1pt solid #cfd8dc"/>
    </style:style>
    <style:style style:name="P1" style:family="paragraph" style:parent-style-name="Heading_20_2">
      <style:text-properties style:use-window-font-color="true" loext:opacity="0%" style:font-name="Arial1" fo:font-size="12pt" style:font-size-asian="12pt" style:font-size-complex="12pt"/>
    </style:style>
    <style:style style:name="P2" style:family="paragraph" style:parent-style-name="Heading_20_2">
      <style:text-properties style:use-window-font-color="true" loext:opacity="0%" style:font-name="Aria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Arial" fo:font-size="12pt" fo:font-weight="bold" officeooo:paragraph-rsid="0014275d" style:font-name-asian="Arial2" style:font-size-asian="12pt" style:font-weight-asian="bold" style:font-name-complex="Arial2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Arial" fo:font-size="12pt" fo:font-weight="bold" officeooo:paragraph-rsid="0014275d" style:font-name-asian="Arial2" style:font-size-asian="12pt" style:font-weight-asian="bold" style:font-name-complex="Arial2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Arial" fo:font-size="12pt" fo:font-weight="normal" officeooo:paragraph-rsid="0014275d" style:font-name-asian="Arial2" style:font-size-asian="12pt" style:font-weight-asian="normal" style:font-name-complex="Arial2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fo:font-weight="bold" officeooo:paragraph-rsid="0016bb55" style:font-name-asian="Arial2" style:font-size-asian="12pt" style:font-weight-asian="bold" style:font-name-complex="Arial2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fo:font-weight="bold" officeooo:paragraph-rsid="0016bb55" style:font-name-asian="Courier New2" style:font-size-asian="12pt" style:font-weight-asian="bold" style:font-name-complex="Courier New2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fo:font-weight="normal" officeooo:paragraph-rsid="0016bb55" style:font-name-asian="Courier New2" style:font-size-asian="12pt" style:font-weight-asian="normal" style:font-name-complex="Courier New2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fo:font-weight="normal" officeooo:paragraph-rsid="0016bb55" style:font-name-asian="Arial2" style:font-size-asian="12pt" style:font-weight-asian="normal" style:font-name-complex="Arial2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Arial1" officeooo:rsid="00185d8f" officeooo:paragraph-rsid="00185d8f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officeooo:paragraph-rsid="00171e20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Arial1" fo:font-size="12pt" officeooo:paragraph-rsid="00171e20" style:font-size-asian="12pt" style:font-size-complex="12pt"/>
    </style:style>
    <style:style style:name="P13" style:family="paragraph" style:parent-style-name="Standard">
      <style:text-properties style:font-name="Arial1" officeooo:rsid="0014275d"/>
    </style:style>
    <style:style style:name="P14" style:family="paragraph" style:parent-style-name="Standard">
      <style:text-properties style:font-name="Arial1" officeooo:rsid="0014275d" officeooo:paragraph-rsid="0014275d"/>
    </style:style>
    <style:style style:name="P15" style:family="paragraph" style:parent-style-name="Standard">
      <style:paragraph-properties fo:text-align="center" style:justify-single-word="false"/>
      <style:text-properties style:font-name="Arial1" officeooo:rsid="0014275d" officeooo:paragraph-rsid="0014275d"/>
    </style:style>
    <style:style style:name="P16" style:family="paragraph" style:parent-style-name="Standard">
      <style:paragraph-properties fo:text-align="start" style:justify-single-word="false"/>
      <style:text-properties style:font-name="Arial1" officeooo:rsid="0014275d" officeooo:paragraph-rsid="0014275d"/>
    </style:style>
    <style:style style:name="P17" style:family="paragraph" style:parent-style-name="Standard">
      <style:paragraph-properties fo:line-height="115%" fo:text-align="start" style:justify-single-word="false"/>
      <style:text-properties style:font-name="Arial1" officeooo:rsid="0014275d" officeooo:paragraph-rsid="0014275d"/>
    </style:style>
    <style:style style:name="P18" style:family="paragraph" style:parent-style-name="Standard">
      <style:text-properties style:font-name="Arial1" officeooo:rsid="001535e7" officeooo:paragraph-rsid="001535e7"/>
    </style:style>
    <style:style style:name="P19" style:family="paragraph" style:parent-style-name="Standard">
      <style:text-properties style:font-name="Arial1" officeooo:rsid="00171e20" officeooo:paragraph-rsid="00171e20"/>
    </style:style>
    <style:style style:name="P20" style:family="paragraph" style:parent-style-name="Standard">
      <style:paragraph-properties fo:margin-left="1.251cm" fo:text-indent="0cm" style:auto-text-indent="false"/>
      <style:text-properties style:font-name="Arial1" officeooo:rsid="00171e20" officeooo:paragraph-rsid="00171e20"/>
    </style:style>
    <style:style style:name="P21" style:family="paragraph" style:parent-style-name="Standard">
      <style:paragraph-properties fo:text-align="start" style:justify-single-word="false"/>
      <style:text-properties style:font-name="Arial1" officeooo:rsid="00171e20" officeooo:paragraph-rsid="00171e20"/>
    </style:style>
    <style:style style:name="P22" style:family="paragraph" style:parent-style-name="Standard">
      <style:text-properties style:font-name="Arial1" officeooo:rsid="001660c0" officeooo:paragraph-rsid="001660c0"/>
    </style:style>
    <style:style style:name="P23" style:family="paragraph" style:parent-style-name="Standard">
      <style:text-properties style:font-name="Arial1" officeooo:rsid="0016bb55" officeooo:paragraph-rsid="0016bb55"/>
    </style:style>
    <style:style style:name="P24" style:family="paragraph" style:parent-style-name="Standard">
      <style:paragraph-properties fo:text-align="center" style:justify-single-word="false"/>
      <style:text-properties style:font-name="Arial1" fo:font-weight="bold" officeooo:rsid="00185d8f" officeooo:paragraph-rsid="00185d8f" style:font-weight-asian="bold" style:font-weight-complex="bold"/>
    </style:style>
    <style:style style:name="P25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weight="bold" officeooo:rsid="0014275d" officeooo:paragraph-rsid="0014275d" style:font-weight-asian="bold" style:font-weight-complex="bold"/>
    </style:style>
    <style:style style:name="P26" style:family="paragraph" style:parent-style-name="Standard">
      <style:text-properties style:font-name="Arial1" fo:font-weight="bold" officeooo:rsid="0014275d" officeooo:paragraph-rsid="0014275d" style:font-weight-asian="bold" style:font-weight-complex="bold"/>
    </style:style>
    <style:style style:name="P27" style:family="paragraph" style:parent-style-name="Standard">
      <style:paragraph-properties fo:margin-left="1.251cm" fo:text-indent="0cm" style:auto-text-indent="false"/>
      <style:text-properties style:font-name="Arial1" fo:font-weight="bold" officeooo:rsid="0014275d" officeooo:paragraph-rsid="0014275d" style:font-weight-asian="bold" style:font-weight-complex="bold"/>
    </style:style>
    <style:style style:name="P28" style:family="paragraph" style:parent-style-name="Standard">
      <style:text-properties style:font-name="Arial1" fo:font-weight="bold" officeooo:rsid="001535e7" officeooo:paragraph-rsid="001535e7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1" fo:font-weight="bold" officeooo:rsid="001535e7" officeooo:paragraph-rsid="001535e7" style:font-weight-asian="bold" style:font-weight-complex="bold"/>
    </style:style>
    <style:style style:name="P30" style:family="paragraph" style:parent-style-name="Standard">
      <style:text-properties style:font-name="Arial1" fo:font-weight="bold" officeooo:rsid="001660c0" officeooo:paragraph-rsid="001660c0" style:font-weight-asian="bold" style:font-weight-complex="bold"/>
    </style:style>
    <style:style style:name="P31" style:family="paragraph" style:parent-style-name="Standard">
      <style:paragraph-properties fo:margin-left="1.251cm" fo:text-indent="0cm" style:auto-text-indent="false"/>
      <style:text-properties style:font-name="Arial1" fo:font-weight="bold" officeooo:rsid="001660c0" officeooo:paragraph-rsid="001660c0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1" fo:font-weight="bold" officeooo:rsid="001660c0" officeooo:paragraph-rsid="001660c0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1" fo:font-weight="bold" officeooo:rsid="0016bb55" officeooo:paragraph-rsid="0016bb55" style:font-weight-asian="bold" style:font-weight-complex="bold"/>
    </style:style>
    <style:style style:name="P34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weight="bold" officeooo:rsid="0016bb55" officeooo:paragraph-rsid="0016bb55" style:font-weight-asian="bold" style:font-weight-complex="bold"/>
    </style:style>
    <style:style style:name="P35" style:family="paragraph" style:parent-style-name="Standard">
      <style:paragraph-properties fo:margin-left="1.251cm" fo:text-indent="0cm" style:auto-text-indent="false"/>
      <style:text-properties style:font-name="Arial1" fo:font-weight="bold" officeooo:rsid="00171e20" officeooo:paragraph-rsid="00171e20" style:font-weight-asian="bold" style:font-weight-complex="bold"/>
    </style:style>
    <style:style style:name="P36" style:family="paragraph" style:parent-style-name="Standard">
      <style:paragraph-properties fo:margin-left="1.251cm" fo:text-align="center" style:justify-single-word="false" fo:text-indent="0cm" style:auto-text-indent="false"/>
      <style:text-properties officeooo:rsid="0014275d" officeooo:paragraph-rsid="0014275d"/>
    </style:style>
    <style:style style:name="P37" style:family="paragraph" style:parent-style-name="Standard">
      <style:text-properties officeooo:rsid="0014275d" officeooo:paragraph-rsid="0014275d"/>
    </style:style>
    <style:style style:name="P38" style:family="paragraph" style:parent-style-name="Standard">
      <style:text-properties officeooo:rsid="001535e7" officeooo:paragraph-rsid="001535e7"/>
    </style:style>
    <style:style style:name="P39" style:family="paragraph" style:parent-style-name="Standard">
      <style:text-properties officeooo:rsid="001660c0" officeooo:paragraph-rsid="001660c0"/>
    </style:style>
    <style:style style:name="P40" style:family="paragraph" style:parent-style-name="Standard">
      <style:text-properties officeooo:paragraph-rsid="0014275d"/>
    </style:style>
    <style:style style:name="P41" style:family="paragraph" style:parent-style-name="Standard">
      <style:text-properties fo:font-weight="bold" officeooo:rsid="0014275d" officeooo:paragraph-rsid="0014275d" style:font-weight-asian="bold" style:font-weight-complex="bold"/>
    </style:style>
    <style:style style:name="P42" style:family="paragraph">
      <style:paragraph-properties fo:line-height="115%"/>
      <style:text-properties fo:color="#ffffff" loext:opacity="100%"/>
    </style:style>
    <style:style style:name="P43" style:family="paragraph">
      <loext:graphic-properties draw:fill="solid" draw:fill-color="#1c1c1c"/>
      <style:paragraph-properties fo:line-height="115%"/>
      <style:text-properties fo:color="#ffffff" loext:opacity="100%"/>
    </style:style>
    <style:style style:name="T1" style:family="text">
      <style:text-properties style:font-name="Arial1"/>
    </style:style>
    <style:style style:name="T2" style:family="text">
      <style:text-properties style:font-name="Arial1" officeooo:rsid="0014275d"/>
    </style:style>
    <style:style style:name="T3" style:family="text">
      <style:text-properties style:font-name="Arial1" officeooo:rsid="001535e7"/>
    </style:style>
    <style:style style:name="T4" style:family="text">
      <style:text-properties style:font-name="Arial1" fo:font-weight="bold" style:font-weight-asian="bold" style:font-weight-complex="bold"/>
    </style:style>
    <style:style style:name="T5" style:family="text">
      <style:text-properties fo:font-weight="bold" style:font-name-asian="Arial2" style:font-weight-asian="bold" style:font-name-complex="Arial2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name-asian="Arial2" style:font-weight-asian="normal" style:font-name-complex="Arial2" style:font-weight-complex="normal"/>
    </style:style>
    <style:style style:name="T8" style:family="text">
      <style:text-properties fo:font-weight="normal" style:font-name-asian="Courier New2" style:font-weight-asian="normal" style:font-name-complex="Courier New2" style:font-weight-complex="normal"/>
    </style:style>
    <style:style style:name="T9" style:family="text">
      <style:text-properties officeooo:rsid="00185d8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ffff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1c1c1c" fo:min-height="1.097cm" draw:shadow-offset-x="0.305cm" draw:shadow-offset-y="0.3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1c1c1c" fo:min-height="2.436cm" draw:shadow-offset-x="0.305cm" draw:shadow-offset-y="0.3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Guía de lanzamiento</text:p>
      <text:p text:style-name="P16"/>
      <text:p text:style-name="P25">Resumen del proceso</text:p>
      <text:p text:style-name="P16"/>
      <text:p text:style-name="P17">Esta guía <text:s/>llevará desde cero hasta tener el sistema la esperanza corriendo en cualquier máquina, el proceso completo toma entre 15 a 25 minutos dependiendo de la conexión a internet.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P3">#</text:p>
            </table:table-cell>
            <table:table-cell table:style-name="Tabla1.A1" office:value-type="string">
              <text:p text:style-name="P4">Etapa</text:p>
            </table:table-cell>
            <table:table-cell table:style-name="Tabla1.A1" office:value-type="string">
              <text:p text:style-name="P4">Qué se hace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4">Instalar requisitos</text:p>
          </table:table-cell>
          <table:table-cell table:style-name="Tabla1.A2" office:value-type="string">
            <text:p text:style-name="P5">Docker Desktop y Git en tu computadora</text:p>
          </table:table-cell>
        </table:table-row>
        <table:table-row table:style-name="Tabla1.1">
          <table:table-cell table:style-name="Tabla1.A3" office:value-type="string">
            <text:p text:style-name="P3">2</text:p>
          </table:table-cell>
          <table:table-cell table:style-name="Tabla1.A3" office:value-type="string">
            <text:p text:style-name="P4">Obtener el proyecto</text:p>
          </table:table-cell>
          <table:table-cell table:style-name="Tabla1.A3" office:value-type="string">
            <text:p text:style-name="P5">Descargar y descomprimir el archivo laesperanza.zip</text:p>
          </table:table-cell>
        </table:table-row>
        <table:table-row table:style-name="Tabla1.1">
          <table:table-cell table:style-name="Tabla1.A2" office:value-type="string">
            <text:p text:style-name="P3">3</text:p>
          </table:table-cell>
          <table:table-cell table:style-name="Tabla1.A2" office:value-type="string">
            <text:p text:style-name="P4">Configurar variables</text:p>
          </table:table-cell>
          <table:table-cell table:style-name="Tabla1.A2" office:value-type="string">
            <text:p text:style-name="P5">Crear el archivo .env con contraseñas y configuración</text:p>
          </table:table-cell>
        </table:table-row>
        <table:table-row table:style-name="Tabla1.1">
          <table:table-cell table:style-name="Tabla1.A3" office:value-type="string">
            <text:p text:style-name="P3">4</text:p>
          </table:table-cell>
          <table:table-cell table:style-name="Tabla1.A3" office:value-type="string">
            <text:p text:style-name="P4">Construir e iniciar</text:p>
          </table:table-cell>
          <table:table-cell table:style-name="Tabla1.A3" office:value-type="string">
            <text:p text:style-name="P5">docker compose up — descarga imágenes y levanta todo</text:p>
          </table:table-cell>
        </table:table-row>
        <table:table-row table:style-name="Tabla1.1"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4">Inicializar la BD</text:p>
          </table:table-cell>
          <table:table-cell table:style-name="Tabla1.A2" office:value-type="string">
            <text:p text:style-name="P5">Aplicar migraciones y cargar datos iniciales (seed)</text:p>
          </table:table-cell>
        </table:table-row>
        <table:table-row table:style-name="Tabla1.1">
          <table:table-cell table:style-name="Tabla1.A3" office:value-type="string">
            <text:p text:style-name="P3">6</text:p>
          </table:table-cell>
          <table:table-cell table:style-name="Tabla1.A3" office:value-type="string">
            <text:p text:style-name="P4">Verificar y probar</text:p>
          </table:table-cell>
          <table:table-cell table:style-name="Tabla1.A3" office:value-type="string">
            <text:p text:style-name="P5">Abrir el navegador y probar con las cuentas de prueba</text:p>
          </table:table-cell>
        </table:table-row>
      </table:table>
      <text:p text:style-name="P16"/>
      <text:p text:style-name="P15"><text:span text:style-name="T12">Requisitos previos</text:span> </text:p>
      <text:p text:style-name="P16"/>
      <text:p text:style-name="P16">Se necesitar instalar 2 herramientas antes de todo. Todo lo demás (Node.js, PostgreSQL, Nginx) corre dentro de Docker automáticamente.</text:p>
      <text:p text:style-name="P16"/>
      <text:p text:style-name="P25">Docker desktop</text:p>
      <text:p text:style-name="P16"/>
      <text:p text:style-name="P13">Docker es el motor que corre todos los servicios del sistema en contenedores aislados.</text:p>
      <text:p text:style-name="Standard"><text:span text:style-name="T2"/></text:p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office:value-type="string">
              <text:h text:style-name="P1" text:outline-level="2">Sistema</text:h>
            </table:table-cell>
            <table:table-cell table:style-name="Tabla2.A1" office:value-type="string">
              <text:h text:style-name="P1" text:outline-level="2">Instrucciones</text:h>
            </table:table-cell>
          </table:table-row>
        </table:table-header-rows>
        <table:table-row table:style-name="Tabla2.1">
          <table:table-cell table:style-name="Tabla2.A2" office:value-type="string">
            <text:h text:style-name="P1" text:outline-level="2">Windows 10/11</text:h>
          </table:table-cell>
          <table:table-cell table:style-name="Tabla2.A2" office:value-type="string">
            <text:h text:style-name="P2" text:outline-level="2">1. Ir a https://docker.com/products/docker-desktop <text:s/>2. Descargar Docker Desktop para Windows <text:s/>3. Ejecutar el instalador <text:s/>4. Reiniciar la computadora <text:s/>5. Abrir Docker Desktop y esperar a que el ícono de ballena quede verde</text:h>
          </table:table-cell>
        </table:table-row>
        <table:table-row table:style-name="Tabla2.1">
          <table:table-cell table:style-name="Tabla2.A3" office:value-type="string">
            <text:h text:style-name="P1" text:outline-level="2">macOS</text:h>
          </table:table-cell>
          <table:table-cell table:style-name="Tabla2.B3" office:value-type="string">
            <text:h text:style-name="P2" text:outline-level="2">1. Ir a https://docker.com/products/docker-desktop <text:s/>2. Descargar según tu chip: Intel o Apple Silicon (M1/M2/M3) <text:s/>3. Arrastrar Docker.app a Aplicaciones <text:s/>4. Abrirlo y aceptar permisos</text:h>
          </table:table-cell>
        </table:table-row>
        <table:table-row table:style-name="Tabla2.1">
          <table:table-cell table:style-name="Tabla2.A2" office:value-type="string">
            <text:h text:style-name="P1" text:outline-level="2">Ubuntu/Linux</text:h>
          </table:table-cell>
          <table:table-cell table:style-name="Tabla2.A2" office:value-type="string">
            <text:h text:style-name="P2" text:outline-level="2">Ejecutar en terminal: curl -fsSL https://get.docker.com | sh &amp;&amp; sudo usermod -aG docker $USER &amp;&amp; newgrp docker</text:h>
          </table:table-cell>
        </table:table-row>
      </table:table>
      <text:p text:style-name="P40"><text:soft-page-break/><text:span text:style-name="T2"/></text:p>
      <text:p text:style-name="P36"><text:span text:style-name="T4">Git</text:span><text:span text:style-name="T1"> </text:span></text:p>
      <text:p text:style-name="P37"><text:span text:style-name="T1"/></text:p>
      <text:p text:style-name="P14">Git es opcional, si descarga el .ZIP directamente, si no lo tiene, de<text:span text:style-name="T9">s</text:span>cárg<text:span text:style-name="T9">uelo</text:span> desde:</text:p>
      <text:p text:style-name="P37"><text:a xlink:type="simple" xlink:href="http://git-scm.com/downloads" text:style-name="Internet_20_link" text:visited-style-name="Visited_20_Internet_20_Link"><text:span text:style-name="T1">http://git-scm.com/downloads</text:span></text:a><text:span text:style-name="T1"> e instalarlo con las opciones por defecto</text:span></text:p>
      <text:p text:style-name="P37"><text:span text:style-name="T1"/></text:p>
      <text:p text:style-name="P37"><text:span text:style-name="T1"/></text:p>
      <text:p text:style-name="P27">Obtener el proyecto</text:p>
      <text:p text:style-name="P37"><text:span text:style-name="T1"/></text:p>
      <text:p text:style-name="P26">Descargar el archivo .zip</text:p>
      <text:p text:style-name="P37"><text:span text:style-name="T1"/></text:p>
      <text:p text:style-name="P14">Descargue el archivo .zip → extraer todo</text:p>
      <text:p text:style-name="P37"><text:span text:style-name="T1"/></text:p>
      <text:p text:style-name="P26">Descomprimir</text:p>
      <text:p text:style-name="P37"><text:span text:style-name="T1"/></text:p>
      <text:p text:style-name="P14">Hacer clic derecho sobre el zip luego extraer todo</text:p>
      <text:p text:style-name="P37"><text:span text:style-name="T1"/></text:p>
      <text:p text:style-name="P26">Abrir una terminal dentro de la carpeta</text:p>
      <text:p text:style-name="P37"><text:span text:style-name="T1"/></text:p>
      <text:p text:style-name="P14">Navegar hacia dentro de la carpeta que dejo el archivo .zip</text:p>
      <text:p text:style-name="P41"><text:span text:style-name="T1"/></text:p>
      <text:p text:style-name="P26">Configurar variables de entorno</text:p>
      <text:p text:style-name="P37"><text:span text:style-name="T1"/></text:p>
      <text:p text:style-name="P14">El archivo .env contiene las configuraciones del sistema (contraseñas de BD, claves JWT, etc), deberá de ser creado antes de arrancar.</text:p>
      <text:p text:style-name="P37"><text:span text:style-name="T1"/></text:p>
      <text:p text:style-name="P26">Crear el archivo .env</text:p>
      <text:p text:style-name="P37"><draw:frame text:anchor-type="paragraph" draw:z-index="0" draw:name="Marco de texto 1" draw:style-name="gr2" draw:text-style-name="P43" svg:width="9.588cm" svg:height="2.798cm" svg:x="-0.042cm" svg:y="0.284cm"><draw:text-box><text:p text:style-name="P42"><text:span text:style-name="T13">#macOS/Linux</text:span></text:p><text:p text:style-name="P42"><text:span text:style-name="T13">Cp .env.example .env</text:span></text:p><text:p text:style-name="P42"><text:span text:style-name="T13"/></text:p><text:p text:style-name="P42"><text:span text:style-name="T13">#Windows</text:span></text:p><text:p text:style-name="P42"><text:span text:style-name="T13">Copy .env.example .env</text:span></text:p></draw:text-box></draw:frame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8"><text:span text:style-name="T1"/></text:p>
      <text:p text:style-name="P28">Editar el archivo .env</text:p>
      <text:p text:style-name="P38"><text:span text:style-name="T1"/></text:p>
      <text:p text:style-name="P18">Abrir el archivo .env con cualquier editor de texto y luego modificar obligatoriamente las siguientes lineas:</text:p>
      <text:p text:style-name="P38"><text:span text:style-name="T1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<draw:frame text:anchor-type="paragraph" draw:z-index="1" draw:name="Marco de texto 2" draw:style-name="gr2" draw:text-style-name="P43" svg:width="16.281cm" svg:height="8.949cm" svg:x="0.206cm" svg:y="-0.206cm"><draw:text-box><text:p text:style-name="P42"># cambiar las siguientes 3 lineas</text:p><text:p text:style-name="P42">POSTGRES_PASSWORD=TuPasswordSeguro202!</text:p><text:p text:style-name="P42"/><text:p text:style-name="P42"># Debe coincidir con POSTGRES_PASSWORD en la URL:</text:p><text:p text:style-name="P42">DATABASE_URL=postgresql://admin:<text:a xlink:href="mailto:TuPasswordSeguro202!@db" xlink:type="simple">TuPasswordSeguro202!@db</text:a>:5432/laesperanza_db</text:p><text:p text:style-name="P42"/><text:p text:style-name="P42"># Clave secreta para JWT — mínimo 32 caracteres, cualquier texto largo:</text:p><text:p text:style-name="P42">JWT_SECRET=miClaveSecretaMuyLargaYSegura2026LaEsperanza</text:p><text:p text:style-name="P42"/><text:p text:style-name="P42">#las siguientes pueden quedar sin modifcar</text:p><text:p text:style-name="P42">POSTGRES_DB=laesperanza_db</text:p><text:p text:style-name="P42">POSTGRES_USER=admin</text:p><text:p text:style-name="P42">JWT_EXPIRES_IN=7d</text:p><text:p text:style-name="P42">PORT=3000</text:p><text:p text:style-name="P42">NODE_ENV=production</text:p><text:p text:style-name="P42">FRONTEND_URL=http://localhost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9">Construir e iniciar el sistema</text:p>
      <text:p text:style-name="P18"/>
      <text:p text:style-name="P18">Este paso descarga todas las imágenes de Docker y construye los contenedores, la primera vez puede llegar a tardar varios minutos, esto dependerá de la conexión a internet.</text:p>
      <text:p text:style-name="P18"/>
      <text:p text:style-name="P18">Luego, se mostrarán los siguientes mensajes:</text:p>
      <text:p text:style-name="P39"><draw:frame draw:style-name="fr2" draw:name="Imagen1" text:anchor-type="char" svg:x="0.002cm" svg:y="0.319cm" svg:width="13.229cm" svg:height="4.551cm" draw:z-index="2"><draw:image xlink:href="Pictures/10000000000001F4000000ACBD3B1CCD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0">Aplicar migraciones</text:p>
      <text:p text:style-name="P22"/>
      <text:p text:style-name="P22">Las migraciones crean la estructura de las 12 tablas de PostgreSQL:</text:p>
      <text:p text:style-name="P39"><draw:frame text:anchor-type="paragraph" draw:z-index="3" draw:name="Marco de texto 4" draw:style-name="gr2" draw:text-style-name="P43" svg:width="13.323cm" svg:height="3.357cm" svg:x="-0.074cm" svg:y="0.476cm"><draw:text-box><text:p text:style-name="P42">Docker compose exec backend npx prisma migrate deploy</text:p><text:p text:style-name="P42"/><text:p text:style-name="P42"/><text:p text:style-name="P42">#deberá de ver lo siguiente</text:p><text:p text:style-name="P42"># Applying migration “20250501000000_init”</text:p><text:p text:style-name="P42"># All migrations have been successfully applied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2">Cargas los datos iniciales con la semilla (seed)</text:p>
      <text:p text:style-name="P22"/>
      <text:p text:style-name="P22">La seed crea el catálogo de productos y las 3 cuentas de prueba:</text:p>
      <text:p text:style-name="P39"/>
      <text:p text:style-name="P39"/>
      <text:p text:style-name="P39"><draw:frame draw:style-name="fr1" draw:name="Imagen2" text:anchor-type="char" svg:width="17.383cm" svg:height="6.932cm" draw:z-index="4"><draw:image xlink:href="Pictures/10000000000002910000010668D1325B.png" xlink:type="simple" xlink:show="embed" xlink:actuate="onLoad" draw:mime-type="image/png"/></draw:frame><text:s/></text:p>
      <text:p text:style-name="P32">Verificar que todo funciona correctamente</text:p>
      <text:p text:style-name="P22"/>
      <text:p text:style-name="P31">Abrir el sistema en el navegador</text:p>
      <text:p text:style-name="P22"/>
      <text:p text:style-name="P22"><draw:frame text:anchor-type="paragraph" draw:z-index="6" draw:name="Marco de texto 6" draw:style-name="gr1" draw:text-style-name="P43" svg:width="16.435cm" svg:height="1.098cm" svg:x="0.021cm" svg:y="0.677cm"><draw:text-box><text:p text:style-name="P42">http://localhost</text:p></draw:text-box></draw:frame>Abrir cualquier navegador de su preferencia y navegar hacia:</text:p>
      <text:p text:style-name="P39"/>
      <text:p text:style-name="P39"/>
      <text:p text:style-name="P39"/>
      <text:p text:style-name="P23">Deberá de visualizar la pantalla de login del sistema la esperanza con el formulario de inicio de sesión.</text:p>
      <text:p text:style-name="P23"/>
      <text:p text:style-name="P33">Iniciar sesión con las cuentas de prueba</text:p>
      <text:p text:style-name="P23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 table:style-name="Tabla12.1">
            <table:table-cell table:style-name="Tabla12.A1" office:value-type="string">
              <text:p text:style-name="P6">Rol</text:p>
            </table:table-cell>
            <table:table-cell table:style-name="Tabla12.A1" office:value-type="string">
              <text:p text:style-name="P6">Email</text:p>
            </table:table-cell>
            <table:table-cell table:style-name="Tabla12.A1" office:value-type="string">
              <text:p text:style-name="P6">Contraseña</text:p>
            </table:table-cell>
            <table:table-cell table:style-name="Tabla12.A1" office:value-type="string">
              <text:p text:style-name="P6">Acceso a</text:p>
            </table:table-cell>
          </table:table-row>
        </table:table-header-rows>
        <table:table-row table:style-name="Tabla12.1">
          <table:table-cell table:style-name="Tabla12.A2" office:value-type="string">
            <text:p text:style-name="P6">Productor</text:p>
          </table:table-cell>
          <table:table-cell table:style-name="Tabla12.A2" office:value-type="string">
            <text:p text:style-name="P8">productor@laesperanza.com</text:p>
          </table:table-cell>
          <table:table-cell table:style-name="Tabla12.A2" office:value-type="string">
            <text:p text:style-name="P7">Admin1234!</text:p>
          </table:table-cell>
          <table:table-cell table:style-name="Tabla12.A2" office:value-type="string">
            <text:p text:style-name="P9">Publicaciones, negociaciones</text:p>
          </table:table-cell>
        </table:table-row>
        <table:table-row table:style-name="Tabla12.1">
          <table:table-cell table:style-name="Tabla12.A3" office:value-type="string">
            <text:p text:style-name="P6">Comprador</text:p>
          </table:table-cell>
          <table:table-cell table:style-name="Tabla12.B3" office:value-type="string">
            <text:p text:style-name="P8">comprador@laesperanza.com</text:p>
          </table:table-cell>
          <table:table-cell table:style-name="Tabla12.C3" office:value-type="string">
            <text:p text:style-name="P7">Admin1234!</text:p>
          </table:table-cell>
          <table:table-cell table:style-name="Tabla12.D3" office:value-type="string">
            <text:p text:style-name="P9">Marketplace, compras</text:p>
          </table:table-cell>
        </table:table-row>
        <table:table-row table:style-name="Tabla12.1">
          <table:table-cell table:style-name="Tabla12.A2" office:value-type="string">
            <text:p text:style-name="P6">Asociación</text:p>
          </table:table-cell>
          <table:table-cell table:style-name="Tabla12.A2" office:value-type="string">
            <text:p text:style-name="P8">asociacion@laesperanza.com</text:p>
          </table:table-cell>
          <table:table-cell table:style-name="Tabla12.A2" office:value-type="string">
            <text:p text:style-name="P7">Admin1234!</text:p>
          </table:table-cell>
          <table:table-cell table:style-name="Tabla12.A2" office:value-type="string">
            <text:p text:style-name="P9">Administración</text:p>
          </table:table-cell>
        </table:table-row>
      </table:table>
      <text:p text:style-name="P23"/>
      <text:p text:style-name="P23"/>
      <text:p text:style-name="P23"/>
      <text:p text:style-name="P23"><text:soft-page-break/></text:p>
      <text:p text:style-name="P33">Verificar que la API responda correctamente</text:p>
      <text:p text:style-name="P23"/>
      <text:p text:style-name="P23">En otra pestaña del navegador, verifique el health check de la API:</text:p>
      <text:p text:style-name="P23"/>
      <text:p text:style-name="P23"><draw:frame text:anchor-type="paragraph" draw:z-index="5" draw:name="Marco de texto 5" draw:style-name="gr1" draw:text-style-name="P43" svg:width="13.944cm" svg:height="2.798cm" svg:x="-0.353cm" svg:y="0.004cm"><draw:text-box><text:p text:style-name="P42"># En el navegador ir hacia:</text:p><text:p text:style-name="P42"><text:a xlink:href="http://localhost:3000/api/v1/health" xlink:type="simple">http://localhost:3000/api/v1/health</text:a></text:p><text:p text:style-name="P42"/><text:p text:style-name="P42">#Deberá ver.</text:p><text:p text:style-name="P42">{ “status”: “ok”, “timestamp”: “2025-05-10T...”}</text:p></draw:text-box></draw:frame></text:p>
      <text:p text:style-name="P23"/>
      <text:p text:style-name="P23"/>
      <text:p text:style-name="P23"/>
      <text:p text:style-name="P23"/>
      <text:p text:style-name="P23"/>
      <text:p text:style-name="P24"/>
      <text:p text:style-name="P24">Comandos para la gestión <text:s/>diaria</text:p>
      <text:p text:style-name="P23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office:value-type="string">
              <text:p text:style-name="P6">Acción</text:p>
            </table:table-cell>
            <table:table-cell table:style-name="Tabla13.A1" office:value-type="string">
              <text:p text:style-name="P6">Comando</text:p>
            </table:table-cell>
          </table:table-row>
        </table:table-header-rows>
        <table:table-row table:style-name="Tabla13.1">
          <table:table-cell table:style-name="Tabla13.A2" office:value-type="string">
            <text:p text:style-name="P6">Iniciar el sistema</text:p>
          </table:table-cell>
          <table:table-cell table:style-name="Tabla13.A2" office:value-type="string">
            <text:p text:style-name="P8">docker compose up -d</text:p>
          </table:table-cell>
        </table:table-row>
        <table:table-row table:style-name="Tabla13.1">
          <table:table-cell table:style-name="Tabla13.A3" office:value-type="string">
            <text:p text:style-name="P6">Detener el sistema</text:p>
          </table:table-cell>
          <table:table-cell table:style-name="Tabla13.A3" office:value-type="string">
            <text:p text:style-name="P8">docker compose down</text:p>
          </table:table-cell>
        </table:table-row>
        <table:table-row table:style-name="Tabla13.1">
          <table:table-cell table:style-name="Tabla13.A2" office:value-type="string">
            <text:p text:style-name="P6">Reiniciar un servicio</text:p>
          </table:table-cell>
          <table:table-cell table:style-name="Tabla13.A2" office:value-type="string">
            <text:p text:style-name="P8">docker compose restart backend</text:p>
          </table:table-cell>
        </table:table-row>
        <table:table-row table:style-name="Tabla13.1">
          <table:table-cell table:style-name="Tabla13.A3" office:value-type="string">
            <text:p text:style-name="P6">Ver logs del backend</text:p>
          </table:table-cell>
          <table:table-cell table:style-name="Tabla13.A3" office:value-type="string">
            <text:p text:style-name="P8">docker compose logs -f backend</text:p>
          </table:table-cell>
        </table:table-row>
        <table:table-row table:style-name="Tabla13.1">
          <table:table-cell table:style-name="Tabla13.A2" office:value-type="string">
            <text:p text:style-name="P6">Ver logs de la base de datos</text:p>
          </table:table-cell>
          <table:table-cell table:style-name="Tabla13.A2" office:value-type="string">
            <text:p text:style-name="P8">docker compose logs -f db</text:p>
          </table:table-cell>
        </table:table-row>
        <table:table-row table:style-name="Tabla13.1">
          <table:table-cell table:style-name="Tabla13.A3" office:value-type="string">
            <text:p text:style-name="P6">Ver logs del frontend</text:p>
          </table:table-cell>
          <table:table-cell table:style-name="Tabla13.A3" office:value-type="string">
            <text:p text:style-name="P8">docker compose logs -f frontend</text:p>
          </table:table-cell>
        </table:table-row>
        <table:table-row table:style-name="Tabla13.1">
          <table:table-cell table:style-name="Tabla13.A2" office:value-type="string">
            <text:p text:style-name="P6">Ver estado de servicios</text:p>
          </table:table-cell>
          <table:table-cell table:style-name="Tabla13.A2" office:value-type="string">
            <text:p text:style-name="P8">docker compose ps</text:p>
          </table:table-cell>
        </table:table-row>
        <table:table-row table:style-name="Tabla13.1">
          <table:table-cell table:style-name="Tabla13.A3" office:value-type="string">
            <text:p text:style-name="P6">Eliminar todo y empezar de cero</text:p>
          </table:table-cell>
          <table:table-cell table:style-name="Tabla13.A3" office:value-type="string">
            <text:p text:style-name="P8">docker compose down -v</text:p>
          </table:table-cell>
        </table:table-row>
        <table:table-row table:style-name="Tabla13.1">
          <table:table-cell table:style-name="Tabla13.A2" office:value-type="string">
            <text:p text:style-name="P6">Acceder al shell del backend</text:p>
          </table:table-cell>
          <table:table-cell table:style-name="Tabla13.A2" office:value-type="string">
            <text:p text:style-name="P8">docker compose exec backend sh</text:p>
          </table:table-cell>
        </table:table-row>
        <table:table-row table:style-name="Tabla13.1">
          <table:table-cell table:style-name="Tabla13.A3" office:value-type="string">
            <text:p text:style-name="P6">Acceder a PostgreSQL</text:p>
          </table:table-cell>
          <table:table-cell table:style-name="Tabla13.A3" office:value-type="string">
            <text:p text:style-name="P8">docker compose exec db psql -U admin -d laesperanza_db</text:p>
          </table:table-cell>
        </table:table-row>
      </table:table>
      <text:p text:style-name="P23"/>
      <text:p text:style-name="P33"/>
      <text:p text:style-name="P33">Flujo de prueba completo</text:p>
      <text:p text:style-name="P23"/>
      <text:p text:style-name="P23">Siga los siguientes pasos para verificar que todos los módulos funcionan correctamente:</text:p>
      <text:p text:style-name="P23"/>
      <text:p text:style-name="P23"/>
      <text:p text:style-name="P34">Como productor</text:p>
      <text:p text:style-name="P23"/>
      <text:p text:style-name="P23">1. Inicie sesión con <text:a xlink:type="simple" xlink:href="mailto:productor@laesperanza" text:style-name="Internet_20_link" text:visited-style-name="Visited_20_Internet_20_Link">productor@laesperanza</text:a>,com / Admin1234!</text:p>
      <text:p text:style-name="P23"/>
      <text:p text:style-name="P23">2. En el dashboard, haga clic en “Nueva publicación”</text:p>
      <text:p text:style-name="P23"/>
      <text:p text:style-name="P23">3. Complete el formulario: seleccione “Maíz”, escriba un titulo, precio y cantidad.</text:p>
      <text:p text:style-name="P23"/>
      <text:p text:style-name="P23"><text:soft-page-break/>4. Haga clic en “Publicar oferta” y verifique que aparece dentro de “Mis publicaciones”</text:p>
      <text:p text:style-name="P23"/>
      <text:p text:style-name="P23"/>
      <text:p text:style-name="P23"/>
      <text:p text:style-name="P20"><text:span text:style-name="T6">Como comprador</text:span> </text:p>
      <text:p text:style-name="P19"/>
      <text:p text:style-name="P19">1. Abra una ventana y navegue hacia <text:a xlink:type="simple" xlink:href="http://localhost/" text:style-name="Internet_20_link" text:visited-style-name="Visited_20_Internet_20_Link">http://localhost</text:a></text:p>
      <text:p text:style-name="P19"/>
      <text:p text:style-name="P19">2. Inicie sesión con: <text:a xlink:type="simple" xlink:href="mailto:comprador@laesperanza.com" text:style-name="Internet_20_link" text:visited-style-name="Visited_20_Internet_20_Link">comprador@laesperanza.com</text:a> / Admin1234!</text:p>
      <text:p text:style-name="P19"/>
      <text:p text:style-name="P19">3. Vaya a la publicación que creo anteriormente y haga clic sobre ella</text:p>
      <text:p text:style-name="P19"/>
      <text:p text:style-name="P19">4. Haga clic en “Iniciar negociaciones”, ingrese la cantidad y las condiciones que desee.</text:p>
      <text:p text:style-name="P19"/>
      <text:p text:style-name="P19">5. Verifique que aparece en “Negociaciones” con estado “pendiente”</text:p>
      <text:p text:style-name="P19"/>
      <text:p text:style-name="P19"/>
      <text:p text:style-name="P35">Como productor (respuesta)</text:p>
      <text:p text:style-name="P19"/>
      <text:p text:style-name="P19">1. Vuelva a la ventana “productor” deberá de aparecer una nueva notificación.</text:p>
      <text:p text:style-name="P19"/>
      <text:p text:style-name="P19">2. Vaya a “negociaciones”, entre a la solicitud y acepte o negocie un precio para acordar el mismo.</text:p>
      <text:p text:style-name="P19"/>
      <text:p text:style-name="P19">3. Envié un mensaje de prueba en el chat.</text:p>
      <text:p text:style-name="P19"/>
      <text:p text:style-name="P19">4. Cree una entrega desde el botón “gestionar entrega”.</text:p>
      <text:p text:style-name="P19"/>
      <text:p text:style-name="P19">5. Confirmar la entrega como productor.</text:p>
      <text:p text:style-name="P19"/>
      <text:p text:style-name="P19"/>
      <text:p text:style-name="P35">Como comprador (completar pedido)</text:p>
      <text:p text:style-name="P19"/>
      <text:p text:style-name="P19">1. Vuelva a la ventana del comprador y <text:span text:style-name="T9">navegue hacia</text:span> entregas.</text:p>
      <text:p text:style-name="P19"/>
      <text:p text:style-name="P19">2. Confirme la entrega como comprador.</text:p>
      <text:p text:style-name="P19"/>
      <text:p text:style-name="P21">3. Verifique que la negociación para automáticamente a estado “completada”.</text:p>
      <text:p text:style-name="P21"/>
      <text:p text:style-name="P21">4. Registre un pago en el módulo de pagos.</text:p>
      <text:p text:style-name="P21"/>
      <text:p text:style-name="P21">Referencia rápida de puertos y servicios</text:p>
      <text:p text:style-name="P21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header-rows>
          <table:table-row table:style-name="Tabla15.1">
            <table:table-cell table:style-name="Tabla15.A1" office:value-type="string">
              <text:p text:style-name="P12"><text:span text:style-name="T5">Puerto</text:span></text:p>
            </table:table-cell>
            <table:table-cell table:style-name="Tabla15.A1" office:value-type="string">
              <text:p text:style-name="P11"><text:span text:style-name="T5">Servicio</text:span></text:p>
            </table:table-cell>
            <table:table-cell table:style-name="Tabla15.A1" office:value-type="string">
              <text:p text:style-name="P11"><text:span text:style-name="T5">Contenedor</text:span></text:p>
            </table:table-cell>
            <table:table-cell table:style-name="Tabla15.A1" office:value-type="string">
              <text:p text:style-name="P11"><text:span text:style-name="T5">Para qué sirve</text:span></text:p>
            </table:table-cell>
          </table:table-row>
        </table:table-header-rows>
        <table:table-row table:style-name="Tabla15.1">
          <table:table-cell table:style-name="Tabla15.A2" office:value-type="string">
            <text:p text:style-name="P12"><text:span text:style-name="T8">80</text:span></text:p>
          </table:table-cell>
          <table:table-cell table:style-name="Tabla15.B2" office:value-type="string">
            <text:p text:style-name="P11"><text:span text:style-name="T7">Nginx</text:span></text:p>
          </table:table-cell>
          <table:table-cell table:style-name="Tabla15.C2" office:value-type="string">
            <text:p text:style-name="P11"><text:span text:style-name="T7">laesperanza-frontend</text:span></text:p>
          </table:table-cell>
          <table:table-cell table:style-name="Tabla15.D2" office:value-type="string">
            <text:p text:style-name="P11"><text:span text:style-name="T7">Acceso al sistema desde el navegador</text:span></text:p>
          </table:table-cell>
        </table:table-row>
        <table:table-row table:style-name="Tabla15.1">
          <table:table-cell table:style-name="Tabla15.A3" office:value-type="string">
            <text:p text:style-name="P12"><text:span text:style-name="T8">3000</text:span></text:p>
          </table:table-cell>
          <table:table-cell table:style-name="Tabla15.A3" office:value-type="string">
            <text:p text:style-name="P11"><text:span text:style-name="T7">Node.js API</text:span></text:p>
          </table:table-cell>
          <table:table-cell table:style-name="Tabla15.A3" office:value-type="string">
            <text:p text:style-name="P11"><text:span text:style-name="T7">laesperanza-</text:span><text:soft-page-break/><text:span text:style-name="T7">backend</text:span></text:p>
          </table:table-cell>
          <table:table-cell table:style-name="Tabla15.A3" office:value-type="string">
            <text:p text:style-name="P11"><text:span text:style-name="T7">API REST — endpoints del </text:span><text:soft-page-break/><text:span text:style-name="T7">sistema</text:span></text:p>
          </table:table-cell>
        </table:table-row>
        <table:table-row table:style-name="Tabla15.1">
          <table:table-cell table:style-name="Tabla15.A4" office:value-type="string">
            <text:p text:style-name="P12"><text:span text:style-name="T8">5432</text:span></text:p>
          </table:table-cell>
          <table:table-cell table:style-name="Tabla15.B4" office:value-type="string">
            <text:p text:style-name="P11"><text:span text:style-name="T7">PostgreSQL</text:span></text:p>
          </table:table-cell>
          <table:table-cell table:style-name="Tabla15.C4" office:value-type="string">
            <text:p text:style-name="P11"><text:span text:style-name="T7">laesperanza-db</text:span></text:p>
          </table:table-cell>
          <table:table-cell table:style-name="Tabla15.D4" office:value-type="string">
            <text:p text:style-name="P11"><text:span text:style-name="T7">Base de datos (solo accesible internamente)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1T00:17:03.105322883</meta:creation-date>
    <dc:date>2026-05-21T11:49:23.660071696</dc:date>
    <meta:editing-duration>PT16M2S</meta:editing-duration>
    <meta:editing-cycles>2</meta:editing-cycles>
    <meta:generator>LibreOffice/24.2.7.2$Linux_X86_64 LibreOffice_project/420$Build-2</meta:generator>
    <meta:document-statistic meta:table-count="5" meta:image-count="2" meta:object-count="0" meta:page-count="7" meta:paragraph-count="146" meta:word-count="839" meta:character-count="5420" meta:non-whitespace-character-count="4711"/>
  </office:meta>
</office:document-meta>
</file>