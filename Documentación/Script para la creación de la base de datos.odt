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Arial" officeooo:rsid="000caeb6" officeooo:paragraph-rsid="000cae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 para la creación de la base de datos </text:p>
      <text:p text:style-name="P1"/>
      <text:p text:style-name="P1"/>
      <text:p text:style-name="P1">-- SISTEMA LA ESPERANZA script de creación de Base de Datos</text:p>
      <text:p text:style-name="P1"/>
      <text:p text:style-name="P1">-- Motor: PostgreSQL 16</text:p>
      <text:p text:style-name="P1"/>
      <text:p text:style-name="P1"/>
      <text:p text:style-name="P1"/>
      <text:p text:style-name="P1">CREATE EXTENSION IF NOT EXISTS "pg_trgm"; <text:s/></text:p>
      <text:p text:style-name="P1"/>
      <text:p text:style-name="P1"/>
      <text:p text:style-name="P1">CREATE TYPE rol_usuario <text:s text:c="7"/>AS ENUM ('productor', 'comprador', 'asociacion');</text:p>
      <text:p text:style-name="P1">CREATE TYPE estado_publicacion AS ENUM ('activa', 'pausada', 'cerrada', 'vencida');</text:p>
      <text:p text:style-name="P1">CREATE TYPE estado_negociacion AS ENUM ('pendiente', 'en_proceso', 'aceptada', 'rechazada', 'completada', 'cancelada');</text:p>
      <text:p text:style-name="P1">CREATE TYPE estado_entrega <text:s text:c="4"/>AS ENUM ('pendiente', 'en_transito', 'entregado', 'con_problema');</text:p>
      <text:p text:style-name="P1">CREATE TYPE estado_pago <text:s text:c="7"/>AS ENUM ('pendiente', 'completado', 'fallido', 'reembolsado');</text:p>
      <text:p text:style-name="P1"/>
      <text:p text:style-name="P1"/>
      <text:p text:style-name="P1">-- TABLA: usuarios</text:p>
      <text:p text:style-name="P1">CREATE TABLE usuarios (</text:p>
      <text:p text:style-name="P1"><text:s text:c="4"/>id <text:s text:c="11"/>SERIAL <text:s text:c="9"/>PRIMARY KEY,</text:p>
      <text:p text:style-name="P1"><text:s text:c="4"/>nombre <text:s text:c="7"/>VARCHAR(100) <text:s text:c="3"/>NOT NULL,</text:p>
      <text:p text:style-name="P1"><text:s text:c="4"/>email <text:s text:c="8"/>VARCHAR(150) <text:s text:c="3"/>NOT NULL UNIQUE,</text:p>
      <text:p text:style-name="P1"><text:s text:c="4"/>password_hash VARCHAR(255) <text:s text:c="3"/>NOT NULL,</text:p>
      <text:p text:style-name="P1"><text:s text:c="4"/>rol <text:s text:c="10"/>rol_usuario <text:s text:c="4"/>NOT NULL,</text:p>
      <text:p text:style-name="P1"><text:s text:c="4"/>telefono <text:s text:c="5"/>VARCHAR(20),</text:p>
      <text:p text:style-name="P1"><text:s text:c="4"/>activo <text:s text:c="7"/>BOOLEAN <text:s text:c="8"/>NOT NULL DEFAULT TRUE,</text:p>
      <text:p text:style-name="P1"><text:s text:c="4"/>created_at <text:s text:c="3"/>TIMESTAMP <text:s text:c="6"/>NOT NULL DEFAULT NOW(),</text:p>
      <text:p text:style-name="P1"><text:s text:c="4"/>updated_at <text:s text:c="3"/>TIMESTAMP <text:s text:c="6"/>NOT NULL DEFAULT NOW()</text:p>
      <text:p text:style-name="P1">);</text:p>
      <text:p text:style-name="P1"/>
      <text:p text:style-name="P1">CREATE INDEX idx_usuarios_email ON usuarios(email);</text:p>
      <text:p text:style-name="P1">CREATE INDEX idx_usuarios_rol <text:s text:c="2"/>ON usuarios(rol);</text:p>
      <text:p text:style-name="P1"/>
      <text:p text:style-name="P1"/>
      <text:p text:style-name="P1">-- TABLA: asociaciones</text:p>
      <text:p text:style-name="P1">CREATE TABLE asociaciones (</text:p>
      <text:p text:style-name="P1"><text:s text:c="4"/>id <text:s text:c="10"/>SERIAL <text:s text:c="7"/>PRIMARY KEY,</text:p>
      <text:p text:style-name="P1"><text:s text:c="4"/>usuario_id <text:s text:c="2"/>INTEGER <text:s text:c="6"/>NOT NULL UNIQUE REFERENCES usuarios(id) ON DELETE CASCADE,</text:p>
      <text:p text:style-name="P1"><text:s text:c="4"/>nombre <text:s text:c="6"/>VARCHAR(200) <text:s/>NOT NULL,</text:p>
      <text:p text:style-name="P1"><text:s text:c="4"/>nit <text:s text:c="9"/>VARCHAR(20) <text:s text:c="2"/>UNIQUE,</text:p>
      <text:p text:style-name="P1"><text:s text:c="4"/>municipio <text:s text:c="3"/>VARCHAR(100),</text:p>
      <text:p text:style-name="P1"><text:s text:c="4"/>departamento VARCHAR(100),</text:p>
      <text:p text:style-name="P1"><text:s text:c="4"/>descripcion <text:s/>TEXT,</text:p>
      <text:p text:style-name="P1"><text:soft-page-break/><text:s text:c="4"/>activa <text:s text:c="6"/>BOOLEAN <text:s text:c="6"/>NOT NULL DEFAULT TRUE,</text:p>
      <text:p text:style-name="P1"><text:s text:c="4"/>created_at <text:s text:c="2"/>TIMESTAMP <text:s text:c="4"/>NOT NULL DEFAULT NOW()</text:p>
      <text:p text:style-name="P1">);</text:p>
      <text:p text:style-name="P1"/>
      <text:p text:style-name="P1"/>
      <text:p text:style-name="P1">-- TABLA: productores</text:p>
      <text:p text:style-name="P1">CREATE TABLE productores (</text:p>
      <text:p text:style-name="P1"><text:s text:c="4"/>id <text:s text:c="11"/>SERIAL <text:s text:c="7"/>PRIMARY KEY,</text:p>
      <text:p text:style-name="P1"><text:s text:c="4"/>usuario_id <text:s text:c="3"/>INTEGER <text:s text:c="6"/>NOT NULL UNIQUE REFERENCES usuarios(id) ON DELETE CASCADE,</text:p>
      <text:p text:style-name="P1"><text:s text:c="4"/>asociacion_id INTEGER <text:s text:c="6"/>REFERENCES asociaciones(id),</text:p>
      <text:p text:style-name="P1"><text:s text:c="4"/>dpi <text:s text:c="10"/>VARCHAR(20) <text:s text:c="2"/>UNIQUE,</text:p>
      <text:p text:style-name="P1"><text:s text:c="4"/>municipio <text:s text:c="4"/>VARCHAR(100),</text:p>
      <text:p text:style-name="P1"><text:s text:c="4"/>departamento <text:s/>VARCHAR(100),</text:p>
      <text:p text:style-name="P1"><text:s text:c="4"/>hectareas <text:s text:c="4"/>DECIMAL(8,2),</text:p>
      <text:p text:style-name="P1"><text:s text:c="4"/>descripcion <text:s text:c="2"/>TEXT,</text:p>
      <text:p text:style-name="P1"><text:s text:c="4"/>calificacion <text:s/>DECIMAL(3,2) <text:s/>NOT NULL DEFAULT 0.00,</text:p>
      <text:p text:style-name="P1"><text:s text:c="4"/>created_at <text:s text:c="3"/>TIMESTAMP <text:s text:c="4"/>NOT NULL DEFAULT NOW()</text:p>
      <text:p text:style-name="P1">);</text:p>
      <text:p text:style-name="P1"/>
      <text:p text:style-name="P1">CREATE INDEX idx_productores_departamento ON productores(departamento);</text:p>
      <text:p text:style-name="P1">CREATE INDEX idx_productores_asociacion <text:s text:c="2"/>ON productores(asociacion_id);</text:p>
      <text:p text:style-name="P1"/>
      <text:p text:style-name="P1">-- TABLA: compradores</text:p>
      <text:p text:style-name="P1">CREATE TABLE compradores (</text:p>
      <text:p text:style-name="P1"><text:s text:c="4"/>id <text:s text:c="12"/>SERIAL <text:s text:c="7"/>PRIMARY KEY,</text:p>
      <text:p text:style-name="P1"><text:s text:c="4"/>usuario_id <text:s text:c="4"/>INTEGER <text:s text:c="6"/>NOT NULL UNIQUE REFERENCES usuarios(id) ON DELETE CASCADE,</text:p>
      <text:p text:style-name="P1"><text:s text:c="4"/>razon_social <text:s text:c="2"/>VARCHAR(200),</text:p>
      <text:p text:style-name="P1"><text:s text:c="4"/>nit <text:s text:c="11"/>VARCHAR(20) <text:s text:c="2"/>UNIQUE,</text:p>
      <text:p text:style-name="P1"><text:s text:c="4"/>municipio <text:s text:c="5"/>VARCHAR(100),</text:p>
      <text:p text:style-name="P1"><text:s text:c="4"/>departamento <text:s text:c="2"/>VARCHAR(100),</text:p>
      <text:p text:style-name="P1"><text:s text:c="4"/>tipo_comprador VARCHAR(50),</text:p>
      <text:p text:style-name="P1"><text:s text:c="4"/>calificacion <text:s text:c="2"/>DECIMAL(3,2) <text:s/>NOT NULL DEFAULT 0.00,</text:p>
      <text:p text:style-name="P1"><text:s text:c="4"/>created_at <text:s text:c="4"/>TIMESTAMP <text:s text:c="4"/>NOT NULL DEFAULT NOW()</text:p>
      <text:p text:style-name="P1">);</text:p>
      <text:p text:style-name="P1"/>
      <text:p text:style-name="P1"/>
      <text:p text:style-name="P1">-- TABLA: productos</text:p>
      <text:p text:style-name="P1">CREATE TABLE productos (</text:p>
      <text:p text:style-name="P1"><text:s text:c="4"/>id <text:s text:c="11"/>SERIAL <text:s text:c="7"/>PRIMARY KEY,</text:p>
      <text:p text:style-name="P1"><text:s text:c="4"/>nombre <text:s text:c="7"/>VARCHAR(150) <text:s/>NOT NULL,</text:p>
      <text:p text:style-name="P1"><text:s text:c="4"/>categoria <text:s text:c="4"/>VARCHAR(100),</text:p>
      <text:p text:style-name="P1"><text:s text:c="4"/>unidad_medida VARCHAR(30) <text:s text:c="2"/>NOT NULL,</text:p>
      <text:p text:style-name="P1"><text:s text:c="4"/>descripcion <text:s text:c="2"/>TEXT,</text:p>
      <text:p text:style-name="P1"><text:s text:c="4"/>activo <text:s text:c="7"/>BOOLEAN <text:s text:c="6"/>NOT NULL DEFAULT TRUE,</text:p>
      <text:p text:style-name="P1"><text:s text:c="4"/>created_at <text:s text:c="3"/>TIMESTAMP <text:s text:c="4"/>NOT NULL DEFAULT NOW()</text:p>
      <text:p text:style-name="P1">);</text:p>
      <text:p text:style-name="P1"/>
      <text:p text:style-name="P1"><text:soft-page-break/>CREATE INDEX idx_productos_categoria ON productos(categoria);</text:p>
      <text:p text:style-name="P1"/>
      <text:p text:style-name="P1">-- TABLA: publicaciones</text:p>
      <text:p text:style-name="P1">CREATE TABLE publicaciones (</text:p>
      <text:p text:style-name="P1"><text:s text:c="4"/>id <text:s text:c="17"/>SERIAL <text:s text:c="13"/>PRIMARY KEY,</text:p>
      <text:p text:style-name="P1"><text:s text:c="4"/>productor_id <text:s text:c="7"/>INTEGER <text:s text:c="12"/>NOT NULL REFERENCES productores(id),</text:p>
      <text:p text:style-name="P1"><text:s text:c="4"/>producto_id <text:s text:c="8"/>INTEGER <text:s text:c="12"/>NOT NULL REFERENCES productos(id),</text:p>
      <text:p text:style-name="P1"><text:s text:c="4"/>titulo <text:s text:c="13"/>VARCHAR(200) <text:s text:c="7"/>NOT NULL,</text:p>
      <text:p text:style-name="P1"><text:s text:c="4"/>descripcion <text:s text:c="8"/>TEXT,</text:p>
      <text:p text:style-name="P1"><text:s text:c="4"/>cantidad_disponible DECIMAL(10,2) <text:s text:c="6"/>NOT NULL,</text:p>
      <text:p text:style-name="P1"><text:s text:c="4"/>precio_unitario <text:s text:c="4"/>DECIMAL(10,2) <text:s text:c="6"/>NOT NULL,</text:p>
      <text:p text:style-name="P1"><text:s text:c="4"/>unidad_medida <text:s text:c="6"/>VARCHAR(30) <text:s text:c="8"/>NOT NULL,</text:p>
      <text:p text:style-name="P1"><text:s text:c="4"/>municipio <text:s text:c="10"/>VARCHAR(100),</text:p>
      <text:p text:style-name="P1"><text:s text:c="4"/>departamento <text:s text:c="7"/>VARCHAR(100),</text:p>
      <text:p text:style-name="P1"><text:s text:c="4"/>fecha_cosecha <text:s text:c="6"/>DATE,</text:p>
      <text:p text:style-name="P1"><text:s text:c="4"/>estado <text:s text:c="13"/>estado_publicacion <text:s/>NOT NULL DEFAULT 'activa',</text:p>
      <text:p text:style-name="P1"><text:s text:c="4"/>imagen_url <text:s text:c="9"/>VARCHAR(500),</text:p>
      <text:p text:style-name="P1"><text:s text:c="4"/>created_at <text:s text:c="9"/>TIMESTAMP <text:s text:c="10"/>NOT NULL DEFAULT NOW(),</text:p>
      <text:p text:style-name="P1"><text:s text:c="4"/>updated_at <text:s text:c="9"/>TIMESTAMP <text:s text:c="10"/>NOT NULL DEFAULT NOW()</text:p>
      <text:p text:style-name="P1">);</text:p>
      <text:p text:style-name="P1"/>
      <text:p text:style-name="P1">CREATE INDEX idx_publicaciones_estado <text:s text:c="6"/>ON publicaciones(estado);</text:p>
      <text:p text:style-name="P1">CREATE INDEX idx_publicaciones_departamento ON publicaciones(departamento);</text:p>
      <text:p text:style-name="P1">CREATE INDEX idx_publicaciones_producto <text:s text:c="4"/>ON publicaciones(producto_id);</text:p>
      <text:p text:style-name="P1">CREATE INDEX idx_publicaciones_productor <text:s text:c="3"/>ON publicaciones(productor_id);</text:p>
      <text:p text:style-name="P1">CREATE INDEX idx_publicaciones_precio <text:s text:c="6"/>ON publicaciones(precio_unitario);</text:p>
      <text:p text:style-name="P1"/>
      <text:p text:style-name="P1"/>
      <text:p text:style-name="P1">-- TABLA: negociaciones</text:p>
      <text:p text:style-name="P1">CREATE TABLE negociaciones (</text:p>
      <text:p text:style-name="P1"><text:s text:c="4"/>id <text:s text:c="20"/>SERIAL <text:s text:c="13"/>PRIMARY KEY,</text:p>
      <text:p text:style-name="P1"><text:s text:c="4"/>publicacion_id <text:s text:c="8"/>INTEGER <text:s text:c="12"/>NOT NULL REFERENCES publicaciones(id),</text:p>
      <text:p text:style-name="P1"><text:s text:c="4"/>comprador_id <text:s text:c="10"/>INTEGER <text:s text:c="12"/>NOT NULL REFERENCES compradores(id),</text:p>
      <text:p text:style-name="P1"><text:s text:c="4"/>productor_id <text:s text:c="10"/>INTEGER <text:s text:c="12"/>NOT NULL REFERENCES productores(id),</text:p>
      <text:p text:style-name="P1"><text:s text:c="4"/>cantidad_solicitada <text:s text:c="3"/>DECIMAL(10,2) <text:s text:c="6"/>NOT NULL,</text:p>
      <text:p text:style-name="P1"><text:s text:c="4"/>precio_acordado <text:s text:c="7"/>DECIMAL(10,2),</text:p>
      <text:p text:style-name="P1"><text:s text:c="4"/>estado <text:s text:c="16"/>estado_negociacion <text:s/>NOT NULL DEFAULT 'pendiente',</text:p>
      <text:p text:style-name="P1"><text:s text:c="4"/>condiciones <text:s text:c="11"/>TEXT,</text:p>
      <text:p text:style-name="P1"><text:s text:c="4"/>fecha_entrega_acordada DATE,</text:p>
      <text:p text:style-name="P1"><text:s text:c="4"/>created_at <text:s text:c="12"/>TIMESTAMP <text:s text:c="10"/>NOT NULL DEFAULT NOW(),</text:p>
      <text:p text:style-name="P1"><text:s text:c="4"/>updated_at <text:s text:c="12"/>TIMESTAMP <text:s text:c="10"/>NOT NULL DEFAULT NOW()</text:p>
      <text:p text:style-name="P1">);</text:p>
      <text:p text:style-name="P1"/>
      <text:p text:style-name="P1">CREATE INDEX idx_negociaciones_comprador <text:s text:c="2"/>ON negociaciones(comprador_id);</text:p>
      <text:p text:style-name="P1">CREATE INDEX idx_negociaciones_productor <text:s text:c="2"/>ON negociaciones(productor_id);</text:p>
      <text:p text:style-name="P1">CREATE INDEX idx_negociaciones_estado <text:s text:c="5"/>ON negociaciones(estado);</text:p>
      <text:p text:style-name="P1">CREATE INDEX idx_negociaciones_publicacion ON negociaciones(publicacion_id);</text:p>
      <text:p text:style-name="P1"/>
      <text:p text:style-name="P1"/>
      <text:p text:style-name="P1"><text:soft-page-break/>-- TABLA: mensajes</text:p>
      <text:p text:style-name="P1">CREATE TABLE mensajes (</text:p>
      <text:p text:style-name="P1"><text:s text:c="4"/>id <text:s text:c="12"/>SERIAL <text:s text:c="4"/>PRIMARY KEY,</text:p>
      <text:p text:style-name="P1"><text:s text:c="4"/>negociacion_id INTEGER <text:s text:c="3"/>NOT NULL REFERENCES negociaciones(id) ON DELETE CASCADE,</text:p>
      <text:p text:style-name="P1"><text:s text:c="4"/>remitente_id <text:s text:c="2"/>INTEGER <text:s text:c="3"/>NOT NULL REFERENCES usuarios(id),</text:p>
      <text:p text:style-name="P1"><text:s text:c="4"/>contenido <text:s text:c="5"/>TEXT <text:s text:c="6"/>NOT NULL,</text:p>
      <text:p text:style-name="P1"><text:s text:c="4"/>leido <text:s text:c="9"/>BOOLEAN <text:s text:c="3"/>NOT NULL DEFAULT FALSE,</text:p>
      <text:p text:style-name="P1"><text:s text:c="4"/>created_at <text:s text:c="4"/>TIMESTAMP <text:s/>NOT NULL DEFAULT NOW()</text:p>
      <text:p text:style-name="P1">);</text:p>
      <text:p text:style-name="P1"/>
      <text:p text:style-name="P1">CREATE INDEX idx_mensajes_negociacion ON mensajes(negociacion_id);</text:p>
      <text:p text:style-name="P1">CREATE INDEX idx_mensajes_remitente <text:s text:c="2"/>ON mensajes(remitente_id);</text:p>
      <text:p text:style-name="P1"/>
      <text:p text:style-name="P1"/>
      <text:p text:style-name="P1">-- TABLA: entregas</text:p>
      <text:p text:style-name="P1"/>
      <text:p text:style-name="P1">CREATE TABLE entregas (</text:p>
      <text:p text:style-name="P1"><text:s text:c="4"/>id <text:s text:c="14"/>SERIAL <text:s text:c="9"/>PRIMARY KEY,</text:p>
      <text:p text:style-name="P1"><text:s text:c="4"/>negociacion_id <text:s text:c="2"/>INTEGER <text:s text:c="8"/>NOT NULL UNIQUE REFERENCES negociaciones(id),</text:p>
      <text:p text:style-name="P1"><text:s text:c="4"/>fecha_programada DATE,</text:p>
      <text:p text:style-name="P1"><text:s text:c="4"/>fecha_realizada <text:s/>DATE,</text:p>
      <text:p text:style-name="P1"><text:s text:c="4"/>lugar_entrega <text:s text:c="3"/>VARCHAR(300),</text:p>
      <text:p text:style-name="P1"><text:s text:c="4"/>estado <text:s text:c="10"/>estado_entrega <text:s/>NOT NULL DEFAULT 'pendiente',</text:p>
      <text:p text:style-name="P1"><text:s text:c="4"/>notas <text:s text:c="11"/>TEXT,</text:p>
      <text:p text:style-name="P1"><text:s text:c="4"/>created_at <text:s text:c="6"/>TIMESTAMP <text:s text:c="6"/>NOT NULL DEFAULT NOW(),</text:p>
      <text:p text:style-name="P1"><text:s text:c="4"/>updated_at <text:s text:c="6"/>TIMESTAMP <text:s text:c="6"/>NOT NULL DEFAULT NOW()</text:p>
      <text:p text:style-name="P1">);</text:p>
      <text:p text:style-name="P1"/>
      <text:p text:style-name="P1">CREATE INDEX idx_entregas_estado ON entregas(estado);</text:p>
      <text:p text:style-name="P1"/>
      <text:p text:style-name="P1"/>
      <text:p text:style-name="P1">-- TABLA: confirmaciones_entrega</text:p>
      <text:p text:style-name="P1">CREATE TABLE confirmaciones_entrega (</text:p>
      <text:p text:style-name="P1"><text:s text:c="4"/>id <text:s text:c="16"/>SERIAL <text:s text:c="4"/>PRIMARY KEY,</text:p>
      <text:p text:style-name="P1"><text:s text:c="4"/>entrega_id <text:s text:c="8"/>INTEGER <text:s text:c="3"/>NOT NULL REFERENCES entregas(id) ON DELETE CASCADE,</text:p>
      <text:p text:style-name="P1"><text:s text:c="4"/>usuario_id <text:s text:c="8"/>INTEGER <text:s text:c="3"/>NOT NULL REFERENCES usuarios(id),</text:p>
      <text:p text:style-name="P1"><text:s text:c="4"/>rol_confirmador <text:s text:c="3"/>VARCHAR(20) NOT NULL,</text:p>
      <text:p text:style-name="P1"><text:s text:c="4"/>confirmado <text:s text:c="8"/>BOOLEAN <text:s text:c="3"/>NOT NULL DEFAULT FALSE,</text:p>
      <text:p text:style-name="P1"><text:s text:c="4"/>observaciones <text:s text:c="5"/>TEXT,</text:p>
      <text:p text:style-name="P1"><text:s text:c="4"/>fecha_confirmacion TIMESTAMP,</text:p>
      <text:p text:style-name="P1"><text:s text:c="4"/>UNIQUE(entrega_id, usuario_id)</text:p>
      <text:p text:style-name="P1">);</text:p>
      <text:p text:style-name="P1"/>
      <text:p text:style-name="P1">CREATE INDEX idx_confirmaciones_entrega ON confirmaciones_entrega(entrega_id);</text:p>
      <text:p text:style-name="P1"/>
      <text:p text:style-name="P1">-- TABLA: pagos</text:p>
      <text:p text:style-name="P1">CREATE TABLE pagos (</text:p>
      <text:p text:style-name="P1"><text:soft-page-break/><text:s text:c="4"/>id <text:s text:c="12"/>SERIAL <text:s text:c="6"/>PRIMARY KEY,</text:p>
      <text:p text:style-name="P1"><text:s text:c="4"/>negociacion_id INTEGER <text:s text:c="5"/>NOT NULL REFERENCES negociaciones(id),</text:p>
      <text:p text:style-name="P1"><text:s text:c="4"/>monto <text:s text:c="9"/>DECIMAL(12,2) NOT NULL,</text:p>
      <text:p text:style-name="P1"><text:s text:c="4"/>metodo_pago <text:s text:c="3"/>VARCHAR(50) <text:s/>NOT NULL,</text:p>
      <text:p text:style-name="P1"><text:s text:c="4"/>referencia <text:s text:c="4"/>VARCHAR(200),</text:p>
      <text:p text:style-name="P1"><text:s text:c="4"/>estado <text:s text:c="8"/>estado_pago <text:s/>NOT NULL DEFAULT 'pendiente',</text:p>
      <text:p text:style-name="P1"><text:s text:c="4"/>fecha_pago <text:s text:c="4"/>DATE,</text:p>
      <text:p text:style-name="P1"><text:s text:c="4"/>registrado_por INTEGER <text:s text:c="5"/>REFERENCES usuarios(id),</text:p>
      <text:p text:style-name="P1"><text:s text:c="4"/>notas <text:s text:c="9"/>TEXT,</text:p>
      <text:p text:style-name="P1"><text:s text:c="4"/>created_at <text:s text:c="4"/>TIMESTAMP <text:s text:c="3"/>NOT NULL DEFAULT NOW()</text:p>
      <text:p text:style-name="P1">);</text:p>
      <text:p text:style-name="P1"/>
      <text:p text:style-name="P1">CREATE INDEX idx_pagos_negociacion ON pagos(negociacion_id);</text:p>
      <text:p text:style-name="P1">CREATE INDEX idx_pagos_estado <text:s text:c="5"/>ON pagos(estado);</text:p>
      <text:p text:style-name="P1"/>
      <text:p text:style-name="P1">-- TABLA: notificaciones</text:p>
      <text:p text:style-name="P1">CREATE TABLE notificaciones (</text:p>
      <text:p text:style-name="P1"><text:s text:c="4"/>id <text:s text:c="11"/>SERIAL <text:s text:c="4"/>PRIMARY KEY,</text:p>
      <text:p text:style-name="P1"><text:s text:c="4"/>usuario_id <text:s text:c="3"/>INTEGER <text:s text:c="3"/>NOT NULL REFERENCES usuarios(id) ON DELETE CASCADE,</text:p>
      <text:p text:style-name="P1"><text:s text:c="4"/>tipo <text:s text:c="9"/>VARCHAR(50) NOT NULL,</text:p>
      <text:p text:style-name="P1"><text:s text:c="4"/>titulo <text:s text:c="7"/>VARCHAR(200) NOT NULL,</text:p>
      <text:p text:style-name="P1"><text:s text:c="4"/>mensaje <text:s text:c="6"/>TEXT <text:s text:c="6"/>NOT NULL,</text:p>
      <text:p text:style-name="P1"><text:s text:c="4"/>leida <text:s text:c="8"/>BOOLEAN <text:s text:c="3"/>NOT NULL DEFAULT FALSE,</text:p>
      <text:p text:style-name="P1"><text:s text:c="4"/>referencia_id INTEGER,</text:p>
      <text:p text:style-name="P1"><text:s text:c="4"/>created_at <text:s text:c="3"/>TIMESTAMP <text:s/>NOT NULL DEFAULT NOW()</text:p>
      <text:p text:style-name="P1">);</text:p>
      <text:p text:style-name="P1"/>
      <text:p text:style-name="P1">CREATE INDEX idx_notificaciones_usuario ON notificaciones(usuario_id);</text:p>
      <text:p text:style-name="P1">CREATE INDEX idx_notificaciones_leida <text:s text:c="2"/>ON notificaciones(leida);</text:p>
      <text:p text:style-name="P1"/>
      <text:p text:style-name="P1">-- TRIGGER</text:p>
      <text:p text:style-name="P1">CREATE OR REPLACE FUNCTION fn_update_timestamp()</text:p>
      <text:p text:style-name="P1">RETURNS TRIGGER AS $$</text:p>
      <text:p text:style-name="P1">BEGIN</text:p>
      <text:p text:style-name="P1"><text:s text:c="4"/>NEW.updated_at = NOW();</text:p>
      <text:p text:style-name="P1"><text:s text:c="4"/>RETURN NEW;</text:p>
      <text:p text:style-name="P1">END;</text:p>
      <text:p text:style-name="P1">$$ LANGUAGE plpgsql;</text:p>
      <text:p text:style-name="P1"/>
      <text:p text:style-name="P1">CREATE TRIGGER trg_usuarios_updated_at</text:p>
      <text:p text:style-name="P1"><text:s text:c="4"/>BEFORE UPDATE ON usuarios</text:p>
      <text:p text:style-name="P1"><text:s text:c="4"/>FOR EACH ROW EXECUTE FUNCTION fn_update_timestamp();</text:p>
      <text:p text:style-name="P1"/>
      <text:p text:style-name="P1">CREATE TRIGGER trg_publicaciones_updated_at</text:p>
      <text:p text:style-name="P1"><text:s text:c="4"/>BEFORE UPDATE ON publicaciones</text:p>
      <text:p text:style-name="P1"><text:s text:c="4"/>FOR EACH ROW EXECUTE FUNCTION fn_update_timestamp();</text:p>
      <text:p text:style-name="P1"/>
      <text:p text:style-name="P1">CREATE TRIGGER trg_negociaciones_updated_at</text:p>
      <text:p text:style-name="P1"><text:s text:c="4"/>BEFORE UPDATE ON negociaciones</text:p>
      <text:p text:style-name="P1"><text:soft-page-break/><text:s text:c="4"/>FOR EACH ROW EXECUTE FUNCTION fn_update_timestamp();</text:p>
      <text:p text:style-name="P1"/>
      <text:p text:style-name="P1">CREATE TRIGGER trg_entregas_updated_at</text:p>
      <text:p text:style-name="P1"><text:s text:c="4"/>BEFORE UPDATE ON entregas</text:p>
      <text:p text:style-name="P1"><text:s text:c="4"/>FOR EACH ROW EXECUTE FUNCTION fn_update_timestamp();</text:p>
      <text:p text:style-name="P1"/>
      <text:p text:style-name="P1">CREATE OR REPLACE FUNCTION fn_verificar_doble_confirmacion()</text:p>
      <text:p text:style-name="P1">RETURNS TRIGGER AS $$</text:p>
      <text:p text:style-name="P1">DECLARE</text:p>
      <text:p text:style-name="P1"><text:s text:c="4"/>v_total_confirmaciones INTEGER;</text:p>
      <text:p text:style-name="P1"><text:s text:c="4"/>v_negociacion_id <text:s text:c="6"/>INTEGER;</text:p>
      <text:p text:style-name="P1">BEGIN</text:p>
      <text:p text:style-name="P1"><text:s text:c="4"/>IF NEW.confirmado = TRUE THEN</text:p>
      <text:p text:style-name="P1"><text:s text:c="8"/>SELECT COUNT(*) INTO v_total_confirmaciones</text:p>
      <text:p text:style-name="P1"><text:s text:c="8"/>FROM confirmaciones_entrega</text:p>
      <text:p text:style-name="P1"><text:s text:c="8"/>WHERE entrega_id = NEW.entrega_id AND confirmado = TRUE;</text:p>
      <text:p text:style-name="P1"/>
      <text:p text:style-name="P1"><text:s text:c="8"/>IF v_total_confirmaciones &gt;= 2 THEN</text:p>
      <text:p text:style-name="P1"><text:s text:c="12"/>UPDATE entregas</text:p>
      <text:p text:style-name="P1"><text:s text:c="12"/>SET estado = 'entregado', fecha_realizada = NOW()</text:p>
      <text:p text:style-name="P1"><text:s text:c="12"/>WHERE id = NEW.entrega_id;</text:p>
      <text:p text:style-name="P1"/>
      <text:p text:style-name="P1"><text:s text:c="12"/>SELECT negociacion_id INTO v_negociacion_id</text:p>
      <text:p text:style-name="P1"><text:s text:c="12"/>FROM entregas WHERE id = NEW.entrega_id;</text:p>
      <text:p text:style-name="P1"/>
      <text:p text:style-name="P1"><text:s text:c="12"/>UPDATE negociaciones</text:p>
      <text:p text:style-name="P1"><text:s text:c="12"/>SET estado = 'completada'</text:p>
      <text:p text:style-name="P1"><text:s text:c="12"/>WHERE id = v_negociacion_id;</text:p>
      <text:p text:style-name="P1"><text:s text:c="8"/>END IF;</text:p>
      <text:p text:style-name="P1"><text:s text:c="4"/>END IF;</text:p>
      <text:p text:style-name="P1"><text:s text:c="4"/>RETURN NEW;</text:p>
      <text:p text:style-name="P1">END;</text:p>
      <text:p text:style-name="P1">$$ LANGUAGE plpgsql;</text:p>
      <text:p text:style-name="P1"/>
      <text:p text:style-name="P1">CREATE TRIGGER trg_doble_confirmacion</text:p>
      <text:p text:style-name="P1"><text:s text:c="4"/>AFTER INSERT OR UPDATE ON confirmaciones_entrega</text:p>
      <text:p text:style-name="P1"><text:s text:c="4"/>FOR EACH ROW EXECUTE FUNCTION fn_verificar_doble_confirmacion();</text:p>
      <text:p text:style-name="P1"/>
      <text:p text:style-name="P1">-- VISTAS</text:p>
      <text:p text:style-name="P1">-- Vista: publicaciones activas con datos del productor y producto</text:p>
      <text:p text:style-name="P1">CREATE OR REPLACE VIEW v_publicaciones_activas AS</text:p>
      <text:p text:style-name="P1">SELECT</text:p>
      <text:p text:style-name="P1"><text:s text:c="4"/>p.id,</text:p>
      <text:p text:style-name="P1"><text:s text:c="4"/>p.titulo,</text:p>
      <text:p text:style-name="P1"><text:s text:c="4"/>p.precio_unitario,</text:p>
      <text:p text:style-name="P1"><text:s text:c="4"/>p.cantidad_disponible,</text:p>
      <text:p text:style-name="P1"><text:s text:c="4"/>p.unidad_medida,</text:p>
      <text:p text:style-name="P1"><text:s text:c="4"/>p.departamento,</text:p>
      <text:p text:style-name="P1"><text:s text:c="4"/>p.municipio,</text:p>
      <text:p text:style-name="P1"><text:soft-page-break/><text:s text:c="4"/>p.fecha_cosecha,</text:p>
      <text:p text:style-name="P1"><text:s text:c="4"/>p.imagen_url,</text:p>
      <text:p text:style-name="P1"><text:s text:c="4"/>p.created_at,</text:p>
      <text:p text:style-name="P1"><text:s text:c="4"/>pr.nombre <text:s text:c="5"/>AS nombre_producto,</text:p>
      <text:p text:style-name="P1"><text:s text:c="4"/>pr.categoria <text:s text:c="2"/>AS categoria_producto,</text:p>
      <text:p text:style-name="P1"><text:s text:c="4"/>u.nombre <text:s text:c="6"/>AS nombre_productor,</text:p>
      <text:p text:style-name="P1"><text:s text:c="4"/>prod.calificacion AS calificacion_productor</text:p>
      <text:p text:style-name="P1">FROM publicaciones p</text:p>
      <text:p text:style-name="P1">JOIN productos <text:s/>pr <text:s text:c="2"/>ON p.producto_id <text:s/>= pr.id</text:p>
      <text:p text:style-name="P1">JOIN productores prod ON p.productor_id = prod.id</text:p>
      <text:p text:style-name="P1">JOIN usuarios <text:s text:c="2"/>u <text:s text:c="3"/>ON prod.usuario_id = u.id</text:p>
      <text:p text:style-name="P1">WHERE p.estado = 'activa';</text:p>
      <text:p text:style-name="P1"/>
      <text:p text:style-name="P1">-- Vista: resumen de negociaciones con participantes</text:p>
      <text:p text:style-name="P1">CREATE OR REPLACE VIEW v_negociaciones_resumen AS</text:p>
      <text:p text:style-name="P1">SELECT</text:p>
      <text:p text:style-name="P1"><text:s text:c="4"/>n.id,</text:p>
      <text:p text:style-name="P1"><text:s text:c="4"/>n.estado,</text:p>
      <text:p text:style-name="P1"><text:s text:c="4"/>n.cantidad_solicitada,</text:p>
      <text:p text:style-name="P1"><text:s text:c="4"/>n.precio_acordado,</text:p>
      <text:p text:style-name="P1"><text:s text:c="4"/>n.fecha_entrega_acordada,</text:p>
      <text:p text:style-name="P1"><text:s text:c="4"/>n.created_at,</text:p>
      <text:p text:style-name="P1"><text:s text:c="4"/>p.titulo <text:s text:c="9"/>AS titulo_publicacion,</text:p>
      <text:p text:style-name="P1"><text:s text:c="4"/>uc.nombre <text:s text:c="8"/>AS nombre_comprador,</text:p>
      <text:p text:style-name="P1"><text:s text:c="4"/>up.nombre <text:s text:c="8"/>AS nombre_productor</text:p>
      <text:p text:style-name="P1">FROM negociaciones n</text:p>
      <text:p text:style-name="P1">JOIN publicaciones p <text:s/>ON n.publicacion_id = p.id</text:p>
      <text:p text:style-name="P1">JOIN compradores <text:s/>c <text:s text:c="2"/>ON n.comprador_id <text:s text:c="2"/>= c.id</text:p>
      <text:p text:style-name="P1">JOIN usuarios <text:s text:c="4"/>uc <text:s/>ON c.usuario_id <text:s text:c="4"/>= uc.id</text:p>
      <text:p text:style-name="P1">JOIN productores <text:s/>pr <text:s/>ON n.productor_id <text:s text:c="2"/>= pr.id</text:p>
      <text:p text:style-name="P1">JOIN usuarios <text:s text:c="4"/>up <text:s/>ON pr.usuario_id <text:s text:c="3"/>= up.id;</text:p>
      <text:p text:style-name="P1">-- FIN DEL SCRIP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5:06:33.821491604</meta:creation-date>
    <dc:date>2026-05-21T15:09:52.308378812</dc:date>
    <meta:editing-duration>PT3M23S</meta:editing-duration>
    <meta:editing-cycles>1</meta:editing-cycles>
    <meta:document-statistic meta:table-count="0" meta:image-count="0" meta:object-count="0" meta:page-count="7" meta:paragraph-count="267" meta:word-count="1074" meta:character-count="11051" meta:non-whitespace-character-count="8290"/>
    <meta:generator>LibreOffice/24.2.7.2$Linux_X86_64 LibreOffice_project/420$Build-2</meta:generator>
  </office:meta>
</office:document-meta>
</file>