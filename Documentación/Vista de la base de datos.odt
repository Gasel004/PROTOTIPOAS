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083e80" officeooo:paragraph-rsid="00083e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sta de la base de datos para el sistema</text:p>
      <text:p text:style-name="P1"/>
      <text:p text:style-name="P1">-- SISTEMA LA ESPERANZA — Vistas de Base de Datos</text:p>
      <text:p text:style-name="P1">-- Versión: 1.0.0 Mayo 2026</text:p>
      <text:p text:style-name="P1">-- Motor: PostgreSQL 16</text:p>
      <text:p text:style-name="P1">--</text:p>
      <text:p text:style-name="P1">-- DOCUMENTACIÓN TÉCNICA</text:p>
      <text:p text:style-name="P1">-- Estas vistas están definidas en el modelo de datos original</text:p>
      <text:p text:style-name="P1">-- (Diagrama ER y schema.sql) pero NO fueron implementadas</text:p>
      <text:p text:style-name="P1">-- en el schema de Prisma del proyecto.</text:p>
      <text:p text:style-name="P1">-- Se documentan aquí para referencia en implementación futura.</text:p>
      <text:p text:style-name="P1"/>
      <text:p text:style-name="P1">CREATE OR REPLACE VIEW v_publicaciones_activas AS</text:p>
      <text:p text:style-name="P1">SELECT</text:p>
      <text:p text:style-name="P1"><text:s text:c="4"/>p.id,</text:p>
      <text:p text:style-name="P1"><text:s text:c="4"/>p.titulo,</text:p>
      <text:p text:style-name="P1"><text:s text:c="4"/>p.precio_unitario,</text:p>
      <text:p text:style-name="P1"><text:s text:c="4"/>p.cantidad_disponible,</text:p>
      <text:p text:style-name="P1"><text:s text:c="4"/>p.unidad_medida,</text:p>
      <text:p text:style-name="P1"><text:s text:c="4"/>p.departamento,</text:p>
      <text:p text:style-name="P1"><text:s text:c="4"/>p.municipio,</text:p>
      <text:p text:style-name="P1"><text:s text:c="4"/>p.fecha_cosecha,</text:p>
      <text:p text:style-name="P1"><text:s text:c="4"/>p.imagen_url,</text:p>
      <text:p text:style-name="P1"><text:s text:c="4"/>p.created_at,</text:p>
      <text:p text:style-name="P1"><text:s text:c="4"/>pr.nombre <text:s text:c="8"/>AS nombre_producto,</text:p>
      <text:p text:style-name="P1"><text:s text:c="4"/>pr.categoria <text:s text:c="5"/>AS categoria_producto,</text:p>
      <text:p text:style-name="P1"><text:s text:c="4"/>u.nombre <text:s text:c="9"/>AS nombre_productor,</text:p>
      <text:p text:style-name="P1"><text:s text:c="4"/>prod.calificacion AS calificacion_productor</text:p>
      <text:p text:style-name="P1">FROM publicaciones p</text:p>
      <text:p text:style-name="P1">JOIN productos <text:s text:c="3"/>pr <text:s text:c="2"/>ON p.producto_id <text:s/>= pr.id</text:p>
      <text:p text:style-name="P1">JOIN productores <text:s/>prod ON p.productor_id = prod.id</text:p>
      <text:p text:style-name="P1">JOIN usuarios <text:s text:c="4"/>u <text:s text:c="3"/>ON prod.usuario_id = u.id</text:p>
      <text:p text:style-name="P1">WHERE p.estado = 'activa';</text:p>
      <text:p text:style-name="P1"/>
      <text:p text:style-name="P1">COMMENT ON VIEW v_publicaciones_activas IS</text:p>
      <text:p text:style-name="P1">'Publicaciones activas con información combinada de producto y productor';</text:p>
      <text:p text:style-name="P1"/>
      <text:p text:style-name="P1">COMMENT ON COLUMN v_publicaciones_activas.nombre_productor IS</text:p>
      <text:p text:style-name="P1">'Nombre del productor desde la tabla usuarios';</text:p>
      <text:p text:style-name="P1"/>
      <text:p text:style-name="P1"/>
      <text:p text:style-name="P1">CREATE OR REPLACE VIEW v_negociaciones_resumen AS</text:p>
      <text:p text:style-name="P1">SELECT</text:p>
      <text:p text:style-name="P1"><text:s text:c="4"/>n.id,</text:p>
      <text:p text:style-name="P1"><text:s text:c="4"/>n.estado,</text:p>
      <text:p text:style-name="P1"><text:s text:c="4"/>n.cantidad_solicitada,</text:p>
      <text:p text:style-name="P1"><text:s text:c="4"/>n.precio_acordado,</text:p>
      <text:p text:style-name="P1"><text:s text:c="4"/>n.fecha_entrega_acordada,</text:p>
      <text:p text:style-name="P1"><text:s text:c="4"/>n.created_at,</text:p>
      <text:p text:style-name="P1"><text:soft-page-break/><text:s text:c="4"/>p.titulo <text:s text:c="9"/>AS titulo_publicacion,</text:p>
      <text:p text:style-name="P1"><text:s text:c="4"/>uc.nombre <text:s text:c="8"/>AS nombre_comprador,</text:p>
      <text:p text:style-name="P1"><text:s text:c="4"/>up.nombre <text:s text:c="8"/>AS nombre_productor</text:p>
      <text:p text:style-name="P1">FROM negociaciones n</text:p>
      <text:p text:style-name="P1">JOIN publicaciones p <text:s text:c="2"/>ON n.publicacion_id = p.id</text:p>
      <text:p text:style-name="P1">JOIN compradores <text:s/>c <text:s text:c="3"/>ON n.comprador_id <text:s text:c="2"/>= c.id</text:p>
      <text:p text:style-name="P1">JOIN usuarios <text:s text:c="4"/>uc <text:s text:c="2"/>ON c.usuario_id <text:s text:c="4"/>= uc.id</text:p>
      <text:p text:style-name="P1">JOIN productores <text:s/>pr <text:s text:c="2"/>ON n.productor_id <text:s text:c="2"/>= pr.id</text:p>
      <text:p text:style-name="P1">JOIN usuarios <text:s text:c="4"/>up <text:s text:c="2"/>ON pr.usuario_id <text:s text:c="3"/>= up.id;</text:p>
      <text:p text:style-name="P1"/>
      <text:p text:style-name="P1">COMMENT ON VIEW v_negociaciones_resumen IS</text:p>
      <text:p text:style-name="P1">'Resumen de negociaciones con participantes y publicación';</text:p>
      <text:p text:style-name="P1"/>
      <text:p text:style-name="P1"/>
      <text:p text:style-name="P1"/>
      <text:p text:style-name="P1">CREATE OR REPLACE VIEW v_entregas_pendientes AS</text:p>
      <text:p text:style-name="P1">SELECT</text:p>
      <text:p text:style-name="P1"><text:s text:c="4"/>e.id,</text:p>
      <text:p text:style-name="P1"><text:s text:c="4"/>e.fecha_programada,</text:p>
      <text:p text:style-name="P1"><text:s text:c="4"/>e.fecha_realizada,</text:p>
      <text:p text:style-name="P1"><text:s text:c="4"/>e.lugar_entrega,</text:p>
      <text:p text:style-name="P1"><text:s text:c="4"/>e.estado <text:s text:c="10"/>AS estado_entrega,</text:p>
      <text:p text:style-name="P1"><text:s text:c="4"/>e.notas,</text:p>
      <text:p text:style-name="P1"><text:s text:c="4"/>n.id <text:s text:c="14"/>AS negociacion_id,</text:p>
      <text:p text:style-name="P1"><text:s text:c="4"/>n.estado <text:s text:c="10"/>AS estado_negociacion,</text:p>
      <text:p text:style-name="P1"><text:s text:c="4"/>p.titulo <text:s text:c="10"/>AS titulo_publicacion,</text:p>
      <text:p text:style-name="P1"><text:s text:c="4"/>up.nombre <text:s text:c="9"/>AS nombre_productor,</text:p>
      <text:p text:style-name="P1"><text:s text:c="4"/>uc.nombre <text:s text:c="9"/>AS nombre_comprador,</text:p>
      <text:p text:style-name="P1"><text:s text:c="4"/>(SELECT COUNT(*) FROM confirmaciones_entrega ce</text:p>
      <text:p text:style-name="P1"><text:s text:c="5"/>WHERE ce.entrega_id = e.id AND ce.confirmado = TRUE) AS confirmaciones_recibidas</text:p>
      <text:p text:style-name="P1">FROM entregas e</text:p>
      <text:p text:style-name="P1">JOIN negociaciones n <text:s/>ON e.negociacion_id = n.id</text:p>
      <text:p text:style-name="P1">JOIN publicaciones p <text:s/>ON n.publicacion_id = p.id</text:p>
      <text:p text:style-name="P1">JOIN productores pr <text:s text:c="2"/>ON n.productor_id <text:s text:c="2"/>= pr.id</text:p>
      <text:p text:style-name="P1">JOIN usuarios up <text:s text:c="5"/>ON pr.usuario_id <text:s text:c="3"/>= up.id</text:p>
      <text:p text:style-name="P1">JOIN compradores c <text:s text:c="3"/>ON n.comprador_id <text:s text:c="2"/>= c.id</text:p>
      <text:p text:style-name="P1">JOIN usuarios uc <text:s text:c="5"/>ON c.usuario_id <text:s text:c="4"/>= uc.id;</text:p>
      <text:p text:style-name="P1"/>
      <text:p text:style-name="P1">COMMENT ON VIEW v_entregas_pendientes IS</text:p>
      <text:p text:style-name="P1">'Entregas con detalle de negociación, participantes y conteo de confirmaciones';</text:p>
      <text:p text:style-name="P1"/>
      <text:p text:style-name="P1"/>
      <text:p text:style-name="P1">CREATE OR REPLACE VIEW v_pagos_resumen AS</text:p>
      <text:p text:style-name="P1">SELECT</text:p>
      <text:p text:style-name="P1"><text:s text:c="4"/>p.estado,</text:p>
      <text:p text:style-name="P1"><text:s text:c="4"/>COUNT(*) <text:s text:c="27"/>AS cantidad_pagos,</text:p>
      <text:p text:style-name="P1"><text:s text:c="4"/>SUM(p.monto) <text:s text:c="23"/>AS monto_total,</text:p>
      <text:p text:style-name="P1"><text:s text:c="4"/>MIN(p.fecha_pago) <text:s text:c="18"/>AS primer_pago,</text:p>
      <text:p text:style-name="P1"><text:s text:c="4"/>MAX(p.fecha_pago) <text:s text:c="18"/>AS ultimo_pago,</text:p>
      <text:p text:style-name="P1"><text:soft-page-break/><text:s text:c="4"/>AVG(p.monto) <text:s text:c="23"/>AS monto_promedio</text:p>
      <text:p text:style-name="P1">FROM pagos p</text:p>
      <text:p text:style-name="P1">GROUP BY p.estado</text:p>
      <text:p text:style-name="P1">ORDER BY p.estado;</text:p>
      <text:p text:style-name="P1"/>
      <text:p text:style-name="P1">COMMENT ON VIEW v_pagos_resumen IS</text:p>
      <text:p text:style-name="P1">'Resumen de pagos agrupados por estado con métricas agregadas';</text:p>
      <text:p text:style-name="P1"/>
      <text:p text:style-name="P1"/>
      <text:p text:style-name="P1"/>
      <text:p text:style-name="P1">-- NOTAS DE IMPLEMENTACIÓN</text:p>
      <text:p text:style-name="P1"/>
      <text:p text:style-name="P1">--Para agregar estas vistas al proyecto real se debe:</text:p>
      <text:p text:style-name="P1"/>
      <text:p text:style-name="P1">-- 1. Crear un archivo de migración SQL raw en Prisma:</text:p>
      <text:p text:style-name="P1">-- <text:s text:c="3"/>prisma/migrations/&lt;timestamp&gt;_vistas/migration.sql</text:p>
      <text:p text:style-name="P1"/>
      <text:p text:style-name="P1">-- 2. O ejecutar manualmente contra la BD:</text:p>
      <text:p text:style-name="P1">-- <text:s text:c="3"/>psql -U &lt;user&gt; -d &lt;database&gt; -f Vistas_DB_LaEsperanza.sql</text:p>
      <text:p text:style-name="P1"/>
      <text:p text:style-name="P1">-- 3. Si se usa Prisma, agregar en schema.prisma:</text:p>
      <text:p text:style-name="P1">-- <text:s text:c="3"/>model v_publicaciones_activas {</text:p>
      <text:p text:style-name="P1">-- <text:s text:c="5"/>// Definición como view (Prisma 5+ soporta views)</text:p>
      <text:p text:style-name="P1">-- <text:s text:c="5"/>@@map("v_publicaciones_activas")</text:p>
      <text:p text:style-name="P1">-- <text:s text:c="3"/>}</text:p>
      <text:p text:style-name="P1"/>
      <text:p text:style-name="P1">-- 4. Extensión recomendada (documentada pero no implementada):</text:p>
      <text:p text:style-name="P1">-- <text:s text:c="3"/>CREATE EXTENSION IF NOT EXISTS "pg_trgm"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1T15:01:07.724733834</meta:creation-date>
    <dc:date>2026-05-21T15:05:54.832717604</dc:date>
    <meta:editing-duration>PT4M52S</meta:editing-duration>
    <meta:editing-cycles>1</meta:editing-cycles>
    <meta:document-statistic meta:table-count="0" meta:image-count="0" meta:object-count="0" meta:page-count="3" meta:paragraph-count="104" meta:word-count="458" meta:character-count="3918" meta:non-whitespace-character-count="3078"/>
    <meta:generator>LibreOffice/24.2.7.2$Linux_X86_64 LibreOffice_project/420$Build-2</meta:generator>
  </office:meta>
</office:document-meta>
</file>