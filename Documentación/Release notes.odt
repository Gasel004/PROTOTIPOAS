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5.29cm"/>
    </style:style>
    <style:style style:name="Tabla1.B" style:family="table-column">
      <style:table-column-properties style:column-width="11.2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5.29cm"/>
    </style:style>
    <style:style style:name="Tabla4.B" style:family="table-column">
      <style:table-column-properties style:column-width="11.2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4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4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2pt" officeooo:paragraph-rsid="00207df1" style:font-size-asian="12pt" style:font-size-complex="12pt"/>
    </style:style>
    <style:style style:name="P2" style:family="paragraph" style:parent-style-name="Standard">
      <style:paragraph-properties fo:margin-left="0.635cm" fo:margin-top="0cm" fo:margin-bottom="0.176cm" style:contextual-spacing="false" fo:text-align="justify" style:justify-single-word="false" fo:text-indent="-0.388cm" style:auto-text-indent="false"/>
      <style:text-properties style:use-window-font-color="true" loext:opacity="0%" fo:font-size="12pt" officeooo:paragraph-rsid="001f443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2pt" officeooo:paragraph-rsid="001f4437" style:font-size-asian="12pt" style:font-size-complex="12pt"/>
    </style:style>
    <style:style style:name="P4" style:family="paragraph" style:parent-style-name="Standard">
      <style:paragraph-properties fo:margin-left="0.635cm" fo:margin-top="0cm" fo:margin-bottom="0.176cm" style:contextual-spacing="false" fo:text-align="justify" style:justify-single-word="false" fo:text-indent="-0.388cm" style:auto-text-indent="false"/>
      <style:text-properties style:use-window-font-color="true" loext:opacity="0%" style:font-name="Arial1" fo:font-size="12pt" officeooo:paragraph-rsid="001f443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2pt" officeooo:rsid="001f4437" officeooo:paragraph-rsid="001f4437" style:font-size-asian="12pt" style:font-size-complex="12pt"/>
    </style:style>
    <style:style style:name="P6" style:family="paragraph" style:parent-style-name="Standard">
      <style:paragraph-properties fo:margin-left="0.635cm" fo:margin-top="0cm" fo:margin-bottom="0.176cm" style:contextual-spacing="false" fo:text-align="justify" style:justify-single-word="false" fo:text-indent="-0.388cm" style:auto-text-indent="false"/>
      <style:text-properties style:use-window-font-color="true" loext:opacity="0%" style:font-name="Arial1" fo:font-size="12pt" officeooo:paragraph-rsid="001f4437" style:font-name-asian="Arial2" style:font-size-asian="12pt" style:font-name-complex="Arial2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1" officeooo:rsid="001f4437" officeooo:paragraph-rsid="001f4437"/>
    </style:style>
    <style:style style:name="P8" style:family="paragraph" style:parent-style-name="Standard">
      <style:paragraph-properties fo:text-align="center" style:justify-single-word="false"/>
      <style:text-properties style:font-name="Arial1" officeooo:rsid="001f4437" officeooo:paragraph-rsid="001f4437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rsid="001f4437" officeooo:paragraph-rsid="001f4437" style:font-weight-asian="bold" style:font-weight-complex="bold"/>
    </style:style>
    <style:style style:name="P10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Arial1" fo:font-weight="bold" officeooo:rsid="001f4437" officeooo:paragraph-rsid="001f443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1f4437" officeooo:paragraph-rsid="001f443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207df1" officeooo:paragraph-rsid="00207df1" style:font-weight-asian="bold" style:font-weight-complex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Arial1" fo:font-weight="bold" officeooo:rsid="00207df1" officeooo:paragraph-rsid="00207df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officeooo:rsid="00207df1" officeooo:paragraph-rsid="00207df1"/>
    </style:style>
    <style:style style:name="P15" style:family="paragraph" style:parent-style-name="Standard">
      <style:paragraph-properties fo:margin-top="0cm" fo:margin-bottom="0.282cm" style:contextual-spacing="false"/>
      <style:text-properties style:font-name="Arial1" officeooo:rsid="00207df1" officeooo:paragraph-rsid="00207df1"/>
    </style:style>
    <style:style style:name="P16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Arial1" officeooo:rsid="00207df1" officeooo:paragraph-rsid="00207df1"/>
    </style:style>
    <style:style style:name="P17" style:family="paragraph" style:parent-style-name="Standard">
      <style:paragraph-properties fo:margin-left="0.635cm" fo:margin-top="0cm" fo:margin-bottom="0.176cm" style:contextual-spacing="false" fo:text-align="justify" style:justify-single-word="false" fo:text-indent="-0.388cm" style:auto-text-indent="false"/>
      <style:text-properties officeooo:paragraph-rsid="001f4437"/>
    </style:style>
    <style:style style:name="P18" style:family="paragraph" style:parent-style-name="Standard">
      <style:paragraph-properties fo:margin-top="0cm" fo:margin-bottom="0.141cm" style:contextual-spacing="false"/>
      <style:text-properties officeooo:paragraph-rsid="00207d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" style:family="text">
      <style:text-properties fo:color="#212121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4" style:family="text">
      <style:text-properties fo:color="#212121" loext:opacity="100%" style:font-name="Arial" fo:font-size="10pt" style:font-name-asian="Arial2" style:font-size-asian="10pt" style:font-name-complex="Arial2" style:font-size-complex="10pt"/>
    </style:style>
    <style:style style:name="T5" style:family="text">
      <style:text-properties fo:color="#212121" loext:opacity="100%" style:font-name="Arial" style:font-name-asian="Arial2" style:font-name-complex="Arial2"/>
    </style:style>
    <style:style style:name="T6" style:family="text">
      <style:text-properties fo:color="#212121" loext:opacity="100%" fo:font-size="10pt" style:font-name-asian="Arial2" style:font-size-asian="10pt" style:font-name-complex="Arial2" style:font-size-complex="10pt"/>
    </style:style>
    <style:style style:name="T7" style:family="text">
      <style:text-properties fo:color="#212121" loext:opacity="100%" style:font-name-asian="Arial2" style:font-name-complex="Arial2"/>
    </style:style>
    <style:style style:name="T8" style:family="text">
      <style:text-properties style:font-name="Arial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9" style:family="text"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0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11" style:family="text">
      <style:text-properties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2" style:family="text">
      <style:text-properties style:font-name="Arial" style:font-name-asian="Arial2" style:font-name-complex="Arial2"/>
    </style:style>
    <style:style style:name="T13" style:family="text">
      <style:text-properties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14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5" style:family="text">
      <style:text-properties style:font-name-asian="Arial2" style:font-name-complex="Arial2"/>
    </style:style>
    <style:style style:name="T16" style:family="text">
      <style:text-properties style:use-window-font-color="true" loext:opacity="0%" style:font-name="Arial1" fo:font-size="12pt" style:font-name-asian="Arial2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lease notes V1.0.0</text:p>
      <text:p text:style-name="P9"/>
      <text:p text:style-name="P10">información de la versión</text:p>
      <text:p text:style-name="P7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3"><text:span text:style-name="T13">Campo</text:span></text:p>
            </table:table-cell>
            <table:table-cell table:style-name="Tabla1.A1" office:value-type="string">
              <text:p text:style-name="P3"><text:span text:style-name="T13">Detalle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3"><text:span text:style-name="T14">Versión</text:span></text:p>
          </table:table-cell>
          <table:table-cell table:style-name="Tabla1.A2" office:value-type="string">
            <text:p text:style-name="P3"><text:span text:style-name="T14">1.0.0</text:span></text:p>
          </table:table-cell>
        </table:table-row>
        <table:table-row table:style-name="Tabla1.1">
          <table:table-cell table:style-name="Tabla1.A3" office:value-type="string">
            <text:p text:style-name="P3"><text:span text:style-name="T14">Tipo de release</text:span></text:p>
          </table:table-cell>
          <table:table-cell table:style-name="Tabla1.A3" office:value-type="string">
            <text:p text:style-name="P3"><text:span text:style-name="T14">Release inicial (GA — General Availability)</text:span></text:p>
          </table:table-cell>
        </table:table-row>
        <table:table-row table:style-name="Tabla1.1">
          <table:table-cell table:style-name="Tabla1.A2" office:value-type="string">
            <text:p text:style-name="P3"><text:span text:style-name="T14">Fecha de liberación</text:span></text:p>
          </table:table-cell>
          <table:table-cell table:style-name="Tabla1.A2" office:value-type="string">
            <text:p text:style-name="P3"><text:span text:style-name="T14">Mayo 2025</text:span></text:p>
          </table:table-cell>
        </table:table-row>
        <table:table-row table:style-name="Tabla1.1">
          <table:table-cell table:style-name="Tabla1.A3" office:value-type="string">
            <text:p text:style-name="P3"><text:span text:style-name="T14">Rama de origen</text:span></text:p>
          </table:table-cell>
          <table:table-cell table:style-name="Tabla1.A3" office:value-type="string">
            <text:p text:style-name="P3"><text:span text:style-name="T14">release/1.0.0 → main</text:span></text:p>
          </table:table-cell>
        </table:table-row>
        <table:table-row table:style-name="Tabla1.1">
          <table:table-cell table:style-name="Tabla1.A2" office:value-type="string">
            <text:p text:style-name="P3"><text:span text:style-name="T14">Tag Git</text:span></text:p>
          </table:table-cell>
          <table:table-cell table:style-name="Tabla1.A2" office:value-type="string">
            <text:p text:style-name="P3"><text:span text:style-name="T14">v1.0.0</text:span></text:p>
          </table:table-cell>
        </table:table-row>
        <table:table-row table:style-name="Tabla1.1">
          <table:table-cell table:style-name="Tabla1.A3" office:value-type="string">
            <text:p text:style-name="P3"><text:span text:style-name="T14">Autor</text:span></text:p>
          </table:table-cell>
          <table:table-cell table:style-name="Tabla1.A3" office:value-type="string">
            <text:p text:style-name="P3"><text:span text:style-name="T14">Equipo de desarrollo — Proyecto III</text:span></text:p>
          </table:table-cell>
        </table:table-row>
        <table:table-row table:style-name="Tabla1.1">
          <table:table-cell table:style-name="Tabla1.A2" office:value-type="string">
            <text:p text:style-name="P3"><text:span text:style-name="T14">Estado</text:span></text:p>
          </table:table-cell>
          <table:table-cell table:style-name="Tabla1.A2" office:value-type="string">
            <text:p text:style-name="P3"><text:span text:style-name="T14">Estable — Listo para producción</text:span></text:p>
          </table:table-cell>
        </table:table-row>
      </table:table>
      <text:p text:style-name="P7"/>
      <text:p text:style-name="P11">Resumen</text:p>
      <text:p text:style-name="P7"/>
      <text:p text:style-name="P7">La versión v1.0.0 constituye el release inicial del sistema, una plataforma web que digitaliza y facilita la comercialización agrícola de un sector en especifico, con soporte para asociaciones de agricultores como entidades organizadoras.</text:p>
      <text:p text:style-name="P7"/>
      <text:p text:style-name="P7">Esta primera versión libera el sistema completo con todas las funcionalidades core implementadas, probadas y documentadas respectivamente, lista para su despliegue en el entorno de producción mediante docker.</text:p>
      <text:p text:style-name="P7"/>
      <text:p text:style-name="P11">Nuevas funcionalidades</text:p>
      <text:p text:style-name="P7"/>
      <text:p text:style-name="P7">Como se trata de la versión primaria, no existen funcionalidades nuevas, esto porque prácticamente todo lo del sistema es nuevo.</text:p>
      <text:p text:style-name="P7"/>
      <text:p text:style-name="P11">Módulo de autenticación y usuarios</text:p>
      <text:p text:style-name="P7"/>
      <text:p text:style-name="P2"><text:span text:style-name="T12">Registro de usuarios con roles diferenciados: productor, comprador y asociación.</text:span></text:p>
      <text:p text:style-name="P2"><text:span text:style-name="T12">Autenticación segura con JWT (JSON Web Tokens), expiración configurable.</text:span></text:p>
      <text:p text:style-name="P2"><text:span text:style-name="T12">Control de acceso basado en roles (RBAC) en todos los endpoints.</text:span></text:p>
      <text:p text:style-name="P2"><text:span text:style-name="T12">Perfiles extendidos por rol: datos comerciales para compradores, datos agrícolas para productores.</text:span></text:p>
      <text:p text:style-name="P7"/>
      <text:p text:style-name="P11">Módulo para las publicaciones</text:p>
      <text:p text:style-name="P7"/>
      <text:p text:style-name="P2"><text:span text:style-name="T12">Creación de ofertas de venta por parte de productores con imagen, precio, cantidad y ubicación.</text:span></text:p>
      <text:p text:style-name="P2"><text:span text:style-name="T12">Búsqueda y filtrado de publicaciones por departamento, municipio, producto y rango de precio.</text:span></text:p>
      <text:p text:style-name="P2"><text:soft-page-break/><text:span text:style-name="T12">Gestión de estados de publicación: activa, pausada, cerrada, vencida.</text:span></text:p>
      <text:p text:style-name="P2"><text:span text:style-name="T12">Paginación en listados para manejo eficiente de grandes volúmenes de datos.</text:span></text:p>
      <text:p text:style-name="P7"/>
      <text:p text:style-name="P8"><text:span text:style-name="T1">Módulo para las negociaciones en privado</text:span> </text:p>
      <text:p text:style-name="P7"/>
      <text:p text:style-name="P4"><text:span text:style-name="T15">Flujo de negociación privada entre comprador y productor sobre una publicación.</text:span></text:p>
      <text:p text:style-name="P4"><text:span text:style-name="T15">Gestión de estados: pendiente → en_proceso → aceptada → completada / rechazada / cancelada.</text:span></text:p>
      <text:p text:style-name="P4"><text:span text:style-name="T15">Registro de precio acordado, condiciones y fecha de entrega pactada.</text:span></text:p>
      <text:p text:style-name="P4"><text:span text:style-name="T15">Restricción de privacidad: solo los participantes pueden ver y actuar en una negociación.</text:span></text:p>
      <text:p text:style-name="P5"/>
      <text:p text:style-name="P11">Módulo para mensajería</text:p>
      <text:p text:style-name="P7"/>
      <text:p text:style-name="P6">Canal de mensajería privado dentro de cada negociación.</text:p>
      <text:p text:style-name="P6">Marcado de mensajes como leídos individual y masivo.</text:p>
      <text:p text:style-name="P6">Generación automática de notificación al recibir un nuevo mensaje.</text:p>
      <text:p text:style-name="P7"/>
      <text:p text:style-name="P12">Módulo para pagos</text:p>
      <text:p text:style-name="P14"/>
      <text:p text:style-name="P6">Registro de pagos por negociación con método, referencia y fecha.</text:p>
      <text:p text:style-name="P6">Soporte para múltiples métodos: efectivo, transferencia, cheque, otro.</text:p>
      <text:p text:style-name="P6">Gestión de estados de pago: pendiente, completado, fallido, reembolsado.</text:p>
      <text:p text:style-name="P14"/>
      <text:p text:style-name="P12">Módulo de notificaciones</text:p>
      <text:p text:style-name="P14"/>
      <text:p text:style-name="P6">Generación automática de alertas internas por eventos del sistema.</text:p>
      <text:p text:style-name="P6">Tipos de notificación: nueva_negociacion, mensaje, confirmacion, sistema.</text:p>
      <text:p text:style-name="P17"><text:span text:style-name="T16">Marcado individual y masivo de notificaciones como leídas.</text:span></text:p>
      <text:p text:style-name="P17"><text:span text:style-name="T4"/></text:p>
      <text:p text:style-name="P12">Infraestructura y DevOPS</text:p>
      <text:p text:style-name="P14"/>
      <text:p text:style-name="P6">Arquitectura de 5 capas: Frontend → Nginx → Backend → Prisma ORM → PostgreSQL 16.</text:p>
      <text:p text:style-name="P6">Contenerización completa con Docker y orquestación con Docker Compose.</text:p>
      <text:p text:style-name="P6">Variables de entorno centralizadas con .env.example documentado.</text:p>
      <text:p text:style-name="P6">Esquema de base de datos con 12 tablas, triggers y vistas en PostgreSQL 16.</text:p>
      <text:p text:style-name="P6">Migraciones versionadas con Prisma Migrate.</text:p>
      <text:p text:style-name="P15"/>
      <text:p text:style-name="P16"><text:span text:style-name="T1">Mejoras técnicas</text:span> </text:p>
      <text:p text:style-name="P18"/>
      <text:p text:style-name="P6">Implementación de Prisma ORM para abstracción y seguridad en acceso a datos.</text:p>
      <text:p text:style-name="P6"><text:soft-page-break/>Arquitectura backend en 4 capas (routes → controllers → services → repositories) para separación de responsabilidades.</text:p>
      <text:p text:style-name="P6">Estado global en frontend con Zustand (librería ligera vs Redux).</text:p>
      <text:p text:style-name="P6">Cliente HTTP centralizado con Axios e interceptores para manejo automático de tokens.</text:p>
      <text:p text:style-name="P6">Configuración de CORS restrictiva para limitar acceso solo al dominio del frontend.</text:p>
      <text:p text:style-name="P6"/>
      <text:p text:style-name="P13">Correcciones de bugs</text:p>
      <text:p text:style-name="P15">Al ser la primaria versión, los bugs no aplican correcciones de versiones anteriores porque no existen.</text:p>
      <text:p text:style-name="P15"/>
      <text:p text:style-name="P13">Requisitos del sistema</text:p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1"><text:span text:style-name="T8">Componente</text:span></text:p>
            </table:table-cell>
            <table:table-cell table:style-name="Tabla4.A1" office:value-type="string">
              <text:p text:style-name="P1"><text:span text:style-name="T8">Requisito mínimo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"><text:span text:style-name="T9">Docker Engine</text:span></text:p>
          </table:table-cell>
          <table:table-cell table:style-name="Tabla4.A2" office:value-type="string">
            <text:p text:style-name="P1"><text:span text:style-name="T9">24.0 o superior</text:span></text:p>
          </table:table-cell>
        </table:table-row>
        <table:table-row table:style-name="Tabla4.1">
          <table:table-cell table:style-name="Tabla4.A3" office:value-type="string">
            <text:p text:style-name="P1"><text:span text:style-name="T9">Docker Compose</text:span></text:p>
          </table:table-cell>
          <table:table-cell table:style-name="Tabla4.A3" office:value-type="string">
            <text:p text:style-name="P1"><text:span text:style-name="T9">2.20 o superior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T9">RAM del servidor</text:span></text:p>
          </table:table-cell>
          <table:table-cell table:style-name="Tabla4.A2" office:value-type="string">
            <text:p text:style-name="P1"><text:span text:style-name="T9">2 GB mínimo (4 GB recomendado)</text:span></text:p>
          </table:table-cell>
        </table:table-row>
        <table:table-row table:style-name="Tabla4.1">
          <table:table-cell table:style-name="Tabla4.A3" office:value-type="string">
            <text:p text:style-name="P1"><text:span text:style-name="T9">Disco</text:span></text:p>
          </table:table-cell>
          <table:table-cell table:style-name="Tabla4.A3" office:value-type="string">
            <text:p text:style-name="P1"><text:span text:style-name="T9">10 GB disponibles para imágenes y datos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T9">Sistema Operativo</text:span></text:p>
          </table:table-cell>
          <table:table-cell table:style-name="Tabla4.A2" office:value-type="string">
            <text:p text:style-name="P1"><text:span text:style-name="T9">Linux (Ubuntu 22.04+), macOS 13+, Windows 11 con WSL2</text:span></text:p>
          </table:table-cell>
        </table:table-row>
        <table:table-row table:style-name="Tabla4.1">
          <table:table-cell table:style-name="Tabla4.A3" office:value-type="string">
            <text:p text:style-name="P1"><text:span text:style-name="T9">Navegador cliente</text:span></text:p>
          </table:table-cell>
          <table:table-cell table:style-name="Tabla4.A3" office:value-type="string">
            <text:p text:style-name="P1"><text:span text:style-name="T9">Chrome 120+, Firefox 121+, Edge 120+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T9">Puertos requeridos</text:span></text:p>
          </table:table-cell>
          <table:table-cell table:style-name="Tabla4.A2" office:value-type="string">
            <text:p text:style-name="P1"><text:span text:style-name="T9">80 (HTTP), 3000 (API), 5432 (BD — solo interno)</text:span>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14:34:08.667271537</meta:creation-date>
    <dc:date>2026-05-21T15:00:10.976531899</dc:date>
    <meta:editing-duration>PT13M5S</meta:editing-duration>
    <meta:editing-cycles>1</meta:editing-cycles>
    <meta:document-statistic meta:table-count="2" meta:image-count="0" meta:object-count="0" meta:page-count="3" meta:paragraph-count="81" meta:word-count="564" meta:character-count="3906" meta:non-whitespace-character-count="3417"/>
    <meta:generator>LibreOffice/24.2.7.2$Linux_X86_64 LibreOffice_project/420$Build-2</meta:generator>
  </office:meta>
</office:document-meta>
</file>