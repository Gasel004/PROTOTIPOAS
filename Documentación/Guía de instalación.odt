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3.207cm"/>
    </style:style>
    <style:style style:name="Tabla1.B" style:family="table-column">
      <style:table-column-properties style:column-width="3.849cm"/>
    </style:style>
    <style:style style:name="Tabla1.C" style:family="table-column">
      <style:table-column-properties style:column-width="9.4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3.879cm"/>
    </style:style>
    <style:style style:name="Tabla2.B" style:family="table-column">
      <style:table-column-properties style:column-width="3.933cm"/>
    </style:style>
    <style:style style:name="Tabla2.C" style:family="table-column">
      <style:table-column-properties style:column-width="8.69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2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2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3" style:family="table">
      <style:table-properties style:width="17.711cm" fo:margin-left="0.002cm" fo:margin-top="0cm" fo:margin-bottom="0cm" table:align="left" style:writing-mode="page"/>
    </style:style>
    <style:style style:name="Tabla3.A" style:family="table-column">
      <style:table-column-properties style:column-width="3.879cm"/>
    </style:style>
    <style:style style:name="Tabla3.B" style:family="table-column">
      <style:table-column-properties style:column-width="5.149cm"/>
    </style:style>
    <style:style style:name="Tabla3.C" style:family="table-column">
      <style:table-column-properties style:column-width="8.68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3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3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P1" style:family="paragraph" style:parent-style-name="Standard">
      <style:text-properties style:font-name="Arial1" officeooo:rsid="00080c6d" officeooo:paragraph-rsid="00080c6d"/>
    </style:style>
    <style:style style:name="P2" style:family="paragraph" style:parent-style-name="Standard">
      <style:paragraph-properties fo:margin-left="1.251cm" fo:text-indent="0cm" style:auto-text-indent="false"/>
      <style:text-properties style:font-name="Arial1" officeooo:rsid="00080c6d" officeooo:paragraph-rsid="00080c6d"/>
    </style:style>
    <style:style style:name="P3" style:family="paragraph" style:parent-style-name="Standard" style:list-style-name="L1">
      <style:paragraph-properties fo:line-height="115%"/>
      <style:text-properties style:font-name="Arial1" officeooo:rsid="00080c6d" officeooo:paragraph-rsid="00080c6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1" officeooo:rsid="00080c6d" officeooo:paragraph-rsid="00080c6d"/>
    </style:style>
    <style:style style:name="P5" style:family="paragraph" style:parent-style-name="Standard">
      <style:paragraph-properties fo:text-align="justify" style:justify-single-word="false"/>
      <style:text-properties style:font-name="Arial1" officeooo:rsid="00080c6d" officeooo:paragraph-rsid="00080c6d"/>
    </style:style>
    <style:style style:name="P6" style:family="paragraph" style:parent-style-name="Standard">
      <style:text-properties style:font-name="Arial1" officeooo:rsid="0008938b" officeooo:paragraph-rsid="00080c6d"/>
    </style:style>
    <style:style style:name="P7" style:family="paragraph" style:parent-style-name="Standard">
      <style:text-properties style:font-name="Arial1" officeooo:rsid="0008938b" officeooo:paragraph-rsid="0008938b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08938b" officeooo:paragraph-rsid="0008938b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099f0e" officeooo:paragraph-rsid="00099f0e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officeooo:rsid="00099f0e" officeooo:paragraph-rsid="00099f0e"/>
    </style:style>
    <style:style style:name="P11" style:family="paragraph" style:parent-style-name="Standard">
      <style:paragraph-properties fo:text-align="center" style:justify-single-word="false"/>
      <style:text-properties style:font-name="Arial1" officeooo:rsid="00099f0e" officeooo:paragraph-rsid="00099f0e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0a7cdf" officeooo:paragraph-rsid="00099f0e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0a7cdf" officeooo:paragraph-rsid="000a7cdf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0bc139" officeooo:paragraph-rsid="000bc139"/>
    </style:style>
    <style:style style:name="P15" style:family="paragraph" style:parent-style-name="Standard">
      <style:text-properties style:font-name="Arial1" officeooo:rsid="000bc139" officeooo:paragraph-rsid="000bc139"/>
    </style:style>
    <style:style style:name="P16" style:family="paragraph" style:parent-style-name="Standard">
      <style:paragraph-properties fo:margin-left="1.251cm" fo:text-indent="0cm" style:auto-text-indent="false"/>
      <style:text-properties style:font-name="Arial1" fo:font-weight="bold" officeooo:rsid="00080c6d" officeooo:paragraph-rsid="00080c6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weight="bold" officeooo:rsid="00080c6d" officeooo:paragraph-rsid="00080c6d" style:font-weight-asian="bold" style:font-weight-complex="bold"/>
    </style:style>
    <style:style style:name="P18" style:family="paragraph" style:parent-style-name="Standard">
      <style:paragraph-properties fo:margin-left="1.251cm" fo:text-align="center" style:justify-single-word="false" fo:text-indent="0cm" style:auto-text-indent="false"/>
      <style:text-properties style:font-name="Arial1" fo:font-weight="bold" officeooo:rsid="00080c6d" officeooo:paragraph-rsid="00080c6d" style:font-weight-asian="bold" style:font-weight-complex="bold"/>
    </style:style>
    <style:style style:name="P19" style:family="paragraph" style:parent-style-name="Standard">
      <style:paragraph-properties fo:margin-left="1.251cm" fo:text-indent="0cm" style:auto-text-indent="false"/>
      <style:text-properties style:font-name="Arial1" fo:font-weight="bold" officeooo:rsid="000c686b" officeooo:paragraph-rsid="000c686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weight="bold" officeooo:rsid="000c686b" officeooo:paragraph-rsid="000c686b" style:font-weight-asian="bold" style:font-weight-complex="bold"/>
    </style:style>
    <style:style style:name="P21" style:family="paragraph" style:parent-style-name="Standard">
      <style:paragraph-properties fo:margin-left="1.251cm" fo:text-indent="0cm" style:auto-text-indent="false"/>
      <style:text-properties style:font-name="Arial1" fo:font-weight="bold" officeooo:rsid="0008938b" officeooo:paragraph-rsid="0008938b" style:font-weight-asian="bold" style:font-weight-complex="bold"/>
    </style:style>
    <style:style style:name="P2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08938b" officeooo:paragraph-rsid="0008938b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weight="bold" officeooo:rsid="0008938b" officeooo:paragraph-rsid="0008938b" style:font-weight-asian="bold" style:font-weight-complex="bold"/>
    </style:style>
    <style:style style:name="P24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099f0e" officeooo:paragraph-rsid="00099f0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weight="bold" officeooo:rsid="00099f0e" officeooo:paragraph-rsid="00099f0e" style:font-weight-asian="bold" style:font-weight-complex="bold"/>
    </style:style>
    <style:style style:name="P2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0a7cdf" officeooo:paragraph-rsid="000a7cd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weight="bold" officeooo:rsid="000a7cdf" officeooo:paragraph-rsid="000a7cdf" style:font-weight-asian="bold" style:font-weight-complex="bold"/>
    </style:style>
    <style:style style:name="P28" style:family="paragraph" style:parent-style-name="Standard">
      <style:paragraph-properties fo:margin-left="1.251cm" fo:text-align="start" style:justify-single-word="false" fo:text-indent="0cm" style:auto-text-indent="false" fo:break-before="page"/>
      <style:text-properties style:font-name="Arial1" fo:font-weight="bold" officeooo:rsid="000bc139" officeooo:paragraph-rsid="000bc139" style:font-weight-asian="bold" style:font-weight-complex="bold"/>
    </style:style>
    <style:style style:name="P29" style:family="paragraph" style:parent-style-name="Standard">
      <style:paragraph-properties fo:margin-left="1.251cm" fo:text-indent="0cm" style:auto-text-indent="false"/>
      <style:text-properties style:font-name="Arial1" fo:font-weight="bold" officeooo:rsid="000bc139" officeooo:paragraph-rsid="000bc139" style:font-weight-asian="bold" style:font-weight-complex="bold"/>
    </style:style>
    <style:style style:name="P30" style:family="paragraph" style:parent-style-name="Standard">
      <style:text-properties style:use-window-font-color="true" loext:opacity="0%" fo:font-size="12pt" officeooo:paragraph-rsid="00080c6d" style:font-size-asian="12pt" style:font-size-complex="12pt"/>
    </style:style>
    <style:style style:name="P31" style:family="paragraph" style:parent-style-name="Standard">
      <style:text-properties style:use-window-font-color="true" loext:opacity="0%" fo:font-size="12pt" officeooo:paragraph-rsid="000a7cdf" style:font-size-asian="12pt" style:font-size-complex="12pt"/>
    </style:style>
    <style:style style:name="P32" style:family="paragraph" style:parent-style-name="Standard">
      <style:text-properties officeooo:rsid="000bc139" officeooo:paragraph-rsid="000bc139"/>
    </style:style>
    <style:style style:name="P33" style:family="paragraph" style:parent-style-name="Standard">
      <style:paragraph-properties fo:text-align="justify" style:justify-single-word="false"/>
      <style:text-properties officeooo:rsid="000bc139" officeooo:paragraph-rsid="000bc139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0a7cdf" officeooo:paragraph-rsid="000a7cdf"/>
    </style:style>
    <style:style style:name="P35" style:family="paragraph" style:parent-style-name="Standard">
      <style:paragraph-properties fo:text-align="center" style:justify-single-word="false"/>
      <style:text-properties style:font-name="arial" fo:font-weight="bold" officeooo:rsid="000bc139" officeooo:paragraph-rsid="000bc139" style:font-weight-asian="bold" style:font-weight-complex="bold"/>
    </style:style>
    <style:style style:name="P36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officeooo:rsid="000bc139" officeooo:paragraph-rsid="000bc139"/>
    </style:style>
    <style:style style:name="P38" style:family="paragraph" style:parent-style-name="Standard">
      <style:paragraph-properties fo:text-align="justify" style:justify-single-word="false"/>
      <style:text-properties style:font-name="arial"/>
    </style:style>
    <style:style style:name="P39" style:family="paragraph">
      <style:paragraph-properties fo:line-height="115%"/>
      <style:text-properties fo:color="#ffffff" loext:opacity="100%" style:font-name="Arial1"/>
    </style:style>
    <style:style style:name="P40" style:family="paragraph">
      <loext:graphic-properties draw:fill="solid" draw:fill-color="#1c1c1c"/>
      <style:paragraph-properties fo:line-height="115%"/>
      <style:text-properties fo:color="#ffffff" loext:opacity="100%" style:font-name="Arial1"/>
    </style:style>
    <style:style style:name="P41" style:family="paragraph">
      <loext:graphic-properties draw:fill="none" draw:fill-color="#ffffff"/>
    </style:style>
    <style:style style:name="P42" style:family="paragraph">
      <style:paragraph-properties fo:line-height="115%"/>
    </style:style>
    <style:style style:name="P43" style:family="paragraph">
      <loext:graphic-properties draw:fill="solid" draw:fill-color="#1c1c1c"/>
      <style:paragraph-properties fo:line-height="115%"/>
      <style:text-properties fo:color="#ffffff" loext:opacity="100%" style:font-name="Arial1" fo:font-size="12pt"/>
    </style:style>
    <style:style style:name="P44" style:family="paragraph">
      <style:paragraph-properties fo:line-height="115%"/>
      <style:text-properties fo:color="#ffffff" loext:opacity="100%" style:font-name="Arial1" fo:font-size="12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" style:font-name-asian="Arial2" style:font-name-complex="Arial2"/>
    </style:style>
    <style:style style:name="T5" style:family="text">
      <style:text-properties style:font-name="Arial" fo:font-weight="bold" style:font-name-asian="Arial2" style:font-weight-asian="bold" style:font-name-complex="Arial2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color="#ffffff" loext:opacity="100%" style:font-name="Arial1"/>
    </style:style>
    <style:style style:name="T9" style:family="text">
      <style:text-properties fo:color="#ffffff" loext:opacity="100%" style:font-name="Arial1" fo:font-size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1c1c1c" fo:min-height="2.0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1c1c1c" fo:min-height="0.7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1c1c1c" fo:min-height="10.0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1c1c1c" fo:min-height="1.34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troducción</text:p>
      <text:p text:style-name="P1"/>
      <text:p text:style-name="P4">Esta guía mue<text:span text:style-name="T1">stra el proceso de instalación y despliegue del sistema-la-esperanza, en un entorno de producción o demostración utilizando docker compose, el sistema está compuesto por cuatro servicios contenerizados que se levantan de forma coordinada.</text:span></text:p>
      <text:p text:style-name="P1"><text:span text:style-name="T1"/></text:p>
      <text:list text:style-name="L1">
        <text:list-item>
          <text:p text:style-name="P3"><text:span text:style-name="T1">Frontend: react + vite (servido por nginx)</text:span></text:p>
        </text:list-item>
        <text:list-item>
          <text:p text:style-name="P3"><text:span text:style-name="T1">Backend: node.js + express + prima ORM</text:span></text:p>
        </text:list-item>
        <text:list-item>
          <text:p text:style-name="P3"><text:span text:style-name="T1">Base de datos: PostgreSQL</text:span></text:p>
        </text:list-item>
        <text:list-item>
          <text:p text:style-name="P3"><text:span text:style-name="T1">Proxy inverso: Nginx</text:span></text:p>
        </text:list-item>
      </text:list>
      <text:p text:style-name="P1"><text:span text:style-name="T1"/></text:p>
      <text:p text:style-name="P17"><text:span text:style-name="T1">Requisitos del sistema</text:span></text:p>
      <text:p text:style-name="P1"><text:span text:style-name="T1"/></text:p>
      <text:p text:style-name="P16"><text:span text:style-name="T1">Hardware mínimo</text:span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30"><text:span text:style-name="T5">Componente</text:span></text:p>
            </table:table-cell>
            <table:table-cell table:style-name="Tabla1.A1" office:value-type="string">
              <text:p text:style-name="P30"><text:span text:style-name="T5">Versión Mínima</text:span></text:p>
            </table:table-cell>
            <table:table-cell table:style-name="Tabla1.A1" office:value-type="string">
              <text:p text:style-name="P30"><text:span text:style-name="T5">Notas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30"><text:span text:style-name="T4">CPU</text:span></text:p>
          </table:table-cell>
          <table:table-cell table:style-name="Tabla1.A2" office:value-type="string">
            <text:p text:style-name="P30"><text:span text:style-name="T4">2 núcleos</text:span></text:p>
          </table:table-cell>
          <table:table-cell table:style-name="Tabla1.A2" office:value-type="string">
            <text:p text:style-name="P30"><text:span text:style-name="T4">4 núcleos recomendado para producción</text:span></text:p>
          </table:table-cell>
        </table:table-row>
        <table:table-row table:style-name="Tabla1.1">
          <table:table-cell table:style-name="Tabla1.A3" office:value-type="string">
            <text:p text:style-name="P30"><text:span text:style-name="T4">RAM</text:span></text:p>
          </table:table-cell>
          <table:table-cell table:style-name="Tabla1.A3" office:value-type="string">
            <text:p text:style-name="P30"><text:span text:style-name="T4">4 GB</text:span></text:p>
          </table:table-cell>
          <table:table-cell table:style-name="Tabla1.A3" office:value-type="string">
            <text:p text:style-name="P30"><text:span text:style-name="T4">8 GB recomendado</text:span></text:p>
          </table:table-cell>
        </table:table-row>
        <table:table-row table:style-name="Tabla1.1">
          <table:table-cell table:style-name="Tabla1.A2" office:value-type="string">
            <text:p text:style-name="P30"><text:span text:style-name="T4">Disco</text:span></text:p>
          </table:table-cell>
          <table:table-cell table:style-name="Tabla1.A2" office:value-type="string">
            <text:p text:style-name="P30"><text:span text:style-name="T4">20 GB libres</text:span></text:p>
          </table:table-cell>
          <table:table-cell table:style-name="Tabla1.A2" office:value-type="string">
            <text:p text:style-name="P30"><text:span text:style-name="T4">SSD recomendado para la base de datos</text:span></text:p>
          </table:table-cell>
        </table:table-row>
        <table:table-row table:style-name="Tabla1.1">
          <table:table-cell table:style-name="Tabla1.A3" office:value-type="string">
            <text:p text:style-name="P30"><text:span text:style-name="T4">Red</text:span></text:p>
          </table:table-cell>
          <table:table-cell table:style-name="Tabla1.A3" office:value-type="string">
            <text:p text:style-name="P30"><text:span text:style-name="T4">100 Mbps</text:span></text:p>
          </table:table-cell>
          <table:table-cell table:style-name="Tabla1.A3" office:value-type="string">
            <text:p text:style-name="P30"><text:span text:style-name="T4">Conexión estable para descarga de imágenes Docker</text:span></text:p>
          </table:table-cell>
        </table:table-row>
      </table:table>
      <text:p text:style-name="P1"><text:span text:style-name="T1"/></text:p>
      <text:p text:style-name="P2"><text:span text:style-name="T2">Software requerido</text:span><text:span text:style-name="T1"> </text:span></text:p>
      <text:p text:style-name="P1"><text:span text:style-name="T1"/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30"><text:span text:style-name="T5">Componente</text:span></text:p>
            </table:table-cell>
            <table:table-cell table:style-name="Tabla2.A1" office:value-type="string">
              <text:p text:style-name="P30"><text:span text:style-name="T5">Versión Mínima</text:span></text:p>
            </table:table-cell>
            <table:table-cell table:style-name="Tabla2.A1" office:value-type="string">
              <text:p text:style-name="P30"><text:span text:style-name="T5">Notas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30"><text:span text:style-name="T4">Sistema Operativo</text:span></text:p>
          </table:table-cell>
          <table:table-cell table:style-name="Tabla2.A2" office:value-type="string">
            <text:p text:style-name="P30"><text:span text:style-name="T4">Ubuntu 22.04 LTS</text:span></text:p>
          </table:table-cell>
          <table:table-cell table:style-name="Tabla2.A2" office:value-type="string">
            <text:p text:style-name="P30"><text:span text:style-name="T4">También compatible con Debian 11+, CentOS 8+</text:span></text:p>
          </table:table-cell>
        </table:table-row>
        <table:table-row table:style-name="Tabla2.1">
          <table:table-cell table:style-name="Tabla2.A3" office:value-type="string">
            <text:p text:style-name="P30"><text:span text:style-name="T4">Docker Engine</text:span></text:p>
          </table:table-cell>
          <table:table-cell table:style-name="Tabla2.A3" office:value-type="string">
            <text:p text:style-name="P30"><text:span text:style-name="T4">24.0 o superior</text:span></text:p>
          </table:table-cell>
          <table:table-cell table:style-name="Tabla2.A3" office:value-type="string">
            <text:p text:style-name="P30"><text:span text:style-name="T4">Incluye Docker CLI y Docker daemon</text:span></text:p>
          </table:table-cell>
        </table:table-row>
        <table:table-row table:style-name="Tabla2.1">
          <table:table-cell table:style-name="Tabla2.A2" office:value-type="string">
            <text:p text:style-name="P30"><text:span text:style-name="T4">Docker Compose</text:span></text:p>
          </table:table-cell>
          <table:table-cell table:style-name="Tabla2.A2" office:value-type="string">
            <text:p text:style-name="P30"><text:span text:style-name="T4">2.20 o superior</text:span></text:p>
          </table:table-cell>
          <table:table-cell table:style-name="Tabla2.A2" office:value-type="string">
            <text:p text:style-name="P30"><text:span text:style-name="T4">Plugin integrado en Docker Desktop</text:span></text:p>
          </table:table-cell>
        </table:table-row>
        <table:table-row table:style-name="Tabla2.1">
          <table:table-cell table:style-name="Tabla2.A3" office:value-type="string">
            <text:p text:style-name="P30"><text:span text:style-name="T4">Git</text:span></text:p>
          </table:table-cell>
          <table:table-cell table:style-name="Tabla2.A3" office:value-type="string">
            <text:p text:style-name="P30"><text:span text:style-name="T4">2.30 o superior</text:span></text:p>
          </table:table-cell>
          <table:table-cell table:style-name="Tabla2.A3" office:value-type="string">
            <text:p text:style-name="P30"><text:span text:style-name="T4">Para clonar el repositorio</text:span></text:p>
          </table:table-cell>
        </table:table-row>
        <table:table-row table:style-name="Tabla2.1">
          <table:table-cell table:style-name="Tabla2.A2" office:value-type="string">
            <text:p text:style-name="P30"><text:span text:style-name="T4">Puerto 80</text:span></text:p>
          </table:table-cell>
          <table:table-cell table:style-name="Tabla2.A2" office:value-type="string">
            <text:p text:style-name="P30"><text:span text:style-name="T4">Libre</text:span></text:p>
          </table:table-cell>
          <table:table-cell table:style-name="Tabla2.A2" office:value-type="string">
            <text:p text:style-name="P30"><text:span text:style-name="T4">Tráfico HTTP — Nginx frontend</text:span></text:p>
          </table:table-cell>
        </table:table-row>
        <table:table-row table:style-name="Tabla2.1">
          <table:table-cell table:style-name="Tabla2.A3" office:value-type="string">
            <text:p text:style-name="P30"><text:span text:style-name="T4">Puerto 3000</text:span></text:p>
          </table:table-cell>
          <table:table-cell table:style-name="Tabla2.A3" office:value-type="string">
            <text:p text:style-name="P30"><text:span text:style-name="T4">Libre</text:span></text:p>
          </table:table-cell>
          <table:table-cell table:style-name="Tabla2.A3" office:value-type="string">
            <text:p text:style-name="P30"><text:span text:style-name="T4">Backend API</text:span></text:p>
          </table:table-cell>
        </table:table-row>
        <table:table-row table:style-name="Tabla2.1">
          <table:table-cell table:style-name="Tabla2.A2" office:value-type="string">
            <text:p text:style-name="P30"><text:span text:style-name="T4">Puerto 5432</text:span></text:p>
          </table:table-cell>
          <table:table-cell table:style-name="Tabla2.A2" office:value-type="string">
            <text:p text:style-name="P30"><text:span text:style-name="T4">Libre (opcional)</text:span></text:p>
          </table:table-cell>
          <table:table-cell table:style-name="Tabla2.A2" office:value-type="string">
            <text:p text:style-name="P30"><text:span text:style-name="T4">PostgreSQL — solo si se expone al host</text:span></text:p>
          </table:table-cell>
        </table:table-row>
      </table:table>
      <text:p text:style-name="P1"><text:span text:style-name="T1"/></text:p>
      <text:p text:style-name="P5"><text:span text:style-name="T1">NOTA: La aplicación Docker Desktop incluye automáticamente Docker compose, en servidores linux debe instalarse el plugin por separado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8"><text:soft-page-break/><text:span text:style-name="T1">Istalar Docker en Ubuntu</text:span></text:p>
      <text:p text:style-name="P1"><text:span text:style-name="T1"/></text:p>
      <text:p text:style-name="P2"><text:span text:style-name="T3">Paso 1:</text:span><text:span text:style-name="T1"> </text:span></text:p>
      <text:p text:style-name="P1"><text:span text:style-name="T1"/></text:p>
      <text:p text:style-name="P1"><text:span text:style-name="T1">Actualizar el sistema e instalar las dependencias</text:span></text:p>
      <text:p text:style-name="P1"><draw:frame text:anchor-type="paragraph" draw:z-index="0" draw:name="Marco de texto 1" draw:style-name="gr5" draw:text-style-name="P43" svg:width="10.335cm" svg:height="1.347cm" svg:x="-0.042cm" svg:y="0.355cm"><draw:text-box><text:p text:style-name="P44">$ sudo apt &amp;&amp; sudo apt upgrade -y</text:p><text:p text:style-name="P44">$ sudo apt install -y ca-certificates curl lsb-release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6"><text:span text:style-name="T1">Paso 2:</text:span></text:p>
      <text:p text:style-name="P1"><text:span text:style-name="T1"/></text:p>
      <text:p text:style-name="P1"><text:span text:style-name="T1">Agregar el repositorio oficial de docker</text:span></text:p>
      <text:p text:style-name="P1"><draw:frame text:anchor-type="paragraph" draw:z-index="1" draw:name="Marco de texto 2" draw:style-name="gr5" draw:text-style-name="P43" svg:width="18.832cm" svg:height="3.357cm" svg:x="-0.166cm" svg:y="0.379cm"><draw:text-box><text:p text:style-name="P44">$ sudo mkdir -p /etc/apt/keyrings</text:p><text:p text:style-name="P44">$ curl -fsSL https://download.docker.com/linux/ubuntu/gpg | sudo gpg --dearmor -o /etc/apt/keyrings/docker.gpg</text:p><text:p text:style-name="P44">$ echo "deb [arch=$(dpkg --print-architecture) signed-by=/etc/apt/keyrings/docker.gpg] https://download.docker.com/linux/ubuntu $(lsb_release -cs) stable" | sudo tee /etc/apt/sources.list.d/docker.list &gt; /dev/null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1"/></text:p>
      <text:p text:style-name="P21"><text:span text:style-name="T1">Paso 3:</text:span></text:p>
      <text:p text:style-name="P7"><text:span text:style-name="T1"/></text:p>
      <text:p text:style-name="P7"><text:span text:style-name="T1">Instalar Docker engine y el plugin compose</text:span></text:p>
      <text:p text:style-name="P7"><text:span text:style-name="T1"/></text:p>
      <text:p text:style-name="P7"><draw:frame text:anchor-type="paragraph" draw:z-index="2" draw:name="Marco de texto 3" draw:style-name="gr5" draw:text-style-name="P43" svg:width="15.595cm" svg:height="1.347cm" svg:x="0.019cm" svg:y="0.007cm"><draw:text-box><text:p text:style-name="P44">$ sudo apt update</text:p><text:p text:style-name="P44">$ sudo apt install -y docker-ce docker-ce-cli containerd,io docker-compose-pluginc</text:p></draw:text-box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21"><text:span text:style-name="T1">Paso 4:</text:span></text:p>
      <text:p text:style-name="P7"><text:span text:style-name="T1"/></text:p>
      <text:p text:style-name="P7"><text:span text:style-name="T1">Agregar usuario actual al grupo docker, esto con el fin de evita “sudo”</text:span></text:p>
      <text:p text:style-name="P7"><draw:frame text:anchor-type="paragraph" draw:z-index="3" draw:name="Marco de texto 4" draw:style-name="gr5" draw:text-style-name="P43" svg:width="15.595cm" svg:height="1.347cm" svg:x="-0.138cm" svg:y="0.386cm"><draw:text-box><text:p text:style-name="P44">$ sudo usermod -aG docker $USER</text:p><text:p text:style-name="P44">$ newrp docker</text:p></draw:text-box></draw:frame><text:span text:style-name="T1"/></text:p>
      <text:p text:style-name="P7"><text:span text:style-name="T1"/></text:p>
      <text:p text:style-name="P1"/>
      <text:p text:style-name="P6"/>
      <text:p text:style-name="P21">Paso 5:</text:p>
      <text:p text:style-name="P7"/>
      <text:p text:style-name="P8">Verifi<text:span text:style-name="T6">car la instalación</text:span></text:p>
      <text:p text:style-name="P8"><draw:frame text:anchor-type="paragraph" draw:z-index="4" draw:name="Marco de texto 5" draw:style-name="gr5" draw:text-style-name="P43" svg:width="15.595cm" svg:height="1.68cm" svg:x="-0.136cm" svg:y="0.18cm"><draw:text-box><text:p text:style-name="P44">$ docker –version</text:p><text:p text:style-name="P44">$ docker compose version </text:p><text:p text:style-name="P44"/></draw:text-box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NOTA: Si la salida muestra: “docker version 24.x y coker compose version v2.x”, la instalación es correcta.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3"><text:soft-page-break/><text:span text:style-name="T6">Obtener el código fuente</text:span></text:p>
      <text:p text:style-name="P8"><text:span text:style-name="T6"/></text:p>
      <text:p text:style-name="P22"><text:span text:style-name="T6">Paso 1:</text:span></text:p>
      <text:p text:style-name="P8"><text:span text:style-name="T6"/></text:p>
      <text:p text:style-name="P8"><text:span text:style-name="T6">Clonar el repositorio</text:span></text:p>
      <text:p text:style-name="P8"><draw:frame text:anchor-type="paragraph" draw:z-index="5" draw:name="Marco de texto 6" draw:style-name="gr5" draw:text-style-name="P43" svg:width="15.595cm" svg:height="1.347cm" svg:x="0.019cm" svg:y="0.367cm"><draw:text-box><text:p text:style-name="P44">$ git clone <text:a xlink:href="http://github.com/Gasel004/sistema-la-esperanza.git" xlink:type="simple">http://github.com/Gasel004/sistema-la-esperanza.git</text:a></text:p><text:p text:style-name="P44">$ git cd <text:a xlink:href="http://github.com/Gasel004/sistema-la-esperanza.git" xlink:type="simple">http://github.com/Gasel004/sistema-la-esperanza.git</text:a></text:p></draw:text-box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4"><text:span text:style-name="T6">Paso 2:</text:span></text:p>
      <text:p text:style-name="P9"><text:span text:style-name="T6"/></text:p>
      <text:p text:style-name="P9"><text:span text:style-name="T6">Verificar la estructura del proyecto</text:span></text:p>
      <text:p text:style-name="P9"><draw:frame text:anchor-type="paragraph" draw:z-index="6" draw:name="Marco de texto 7" draw:style-name="gr5" draw:text-style-name="P43" svg:width="11.607cm" svg:height="1.347cm" svg:x="0.019cm" svg:y="0.34cm"><draw:text-box><text:p text:style-name="P44">$ ls -laesperanza</text:p><text:p text:style-name="P44"/></draw:text-box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Si hasta este paso se realizaron los pasos correctamente deberá de obtenerse las siguientes carpetas: frontend, backend, nginx, database y el archivo docker-compose.yml</text:span></text:p>
      <text:p text:style-name="P9"><text:span text:style-name="T6"/></text:p>
      <text:p text:style-name="P25"><text:span text:style-name="T6">Configuración del entorno</text:span></text:p>
      <text:p text:style-name="P9"><text:span text:style-name="T6"/></text:p>
      <text:p text:style-name="P24"><text:span text:style-name="T6">Paso 1:</text:span></text:p>
      <text:p text:style-name="P9"><text:span text:style-name="T6"/></text:p>
      <text:p text:style-name="P9"><text:span text:style-name="T6">Crear el archivo de las variables de entorno</text:span></text:p>
      <text:p text:style-name="P9"><draw:frame text:anchor-type="paragraph" draw:z-index="7" draw:name="Marco de texto 8" draw:style-name="gr5" draw:text-style-name="P43" svg:width="8.4cm" svg:height="1.347cm" svg:x="-0.042cm" svg:y="0.217cm"><draw:text-box><text:p text:style-name="P44">$ cp .env.example .env</text:p><text:p text:style-name="P44">$ nano .env</text:p></draw:text-box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Editar la siguientes variables de entorno en el archivo anterior, de la siguiente manera:</text:span></text:p>
      <text:p text:style-name="P9"><draw:frame text:anchor-type="paragraph" draw:z-index="8" draw:name="Marco de texto 9" draw:style-name="gr4" draw:text-style-name="P43" svg:width="14.223cm" svg:height="10.067cm" svg:x="0.019cm" svg:y="0.43cm"><draw:text-box><text:p text:style-name="P42"><text:span text:style-name="T9">#base de datos </text:span></text:p><text:p text:style-name="P42"><text:span text:style-name="T9">POSTGRES_DB=laesperanza_db</text:span></text:p><text:p text:style-name="P42"><text:span text:style-name="T9">POSTGRES_USER=laesperanza_user</text:span></text:p><text:p text:style-name="P42"><text:span text:style-name="T9">POSTGRES_PASSWORD=CambiarEstaContrasena2026!</text:span></text:p><text:p text:style-name="P42"><text:span text:style-name="T9"><text:s/></text:span></text:p><text:p text:style-name="P42"><text:span text:style-name="T9">#backend </text:span></text:p><text:p text:style-name="P42"><text:span text:style-name="T9">NODE_ENV=production</text:span></text:p><text:p text:style-name="P42"><text:span text:style-name="T9">PORT=3000</text:span></text:p><text:p text:style-name="P42"><text:span text:style-name="T9">DATABASE_URL=postgresql://laesperanza_user:CambiarEstaContrasena2026!</text:span><text:span text:style-name="T9">@db:5432/laesperanza_db</text:span></text:p><text:p text:style-name="P42"><text:span text:style-name="T9"><text:s/></text:span></text:p><text:p text:style-name="P42"><text:span text:style-name="T9">#JWT </text:span></text:p><text:p text:style-name="P42"><text:span text:style-name="T9">JWT_SECRET=CambiarPorUnValorAleatorioSeguroDe64Caracteres</text:span></text:p><text:p text:style-name="P42"><text:span text:style-name="T9">JWT_EXPIRES_IN=7d</text:span></text:p><text:p text:style-name="P42"><text:span text:style-name="T9"><text:s/></text:span></text:p><text:p text:style-name="P42"><text:span text:style-name="T9">#frontend </text:span></text:p><text:p text:style-name="P42"><text:span text:style-name="T9">VITE_API_URL=http://localhost:3000/api/v1</text:span></text:p></draw:text-box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span text:style-name="T7">Paso 2:</text:span><text:span text:style-name="T6"> </text:span></text:p>
      <text:p text:style-name="P9"><text:soft-page-break/><text:span text:style-name="T6"/></text:p>
      <text:p text:style-name="P9"><text:span text:style-name="T6">Generar un JWT secret seguro (opcional, pero, recomendado)</text:span></text:p>
      <text:p text:style-name="P9"><draw:frame text:anchor-type="paragraph" draw:z-index="9" draw:name="Marco de texto 10" draw:style-name="gr2" draw:text-style-name="P40" svg:width="15.595cm" svg:height="0.786cm" svg:x="-0.042cm" svg:y="0.268cm"><draw:text-box><text:p text:style-name="P39">$ openssl rand -hex 64</text:p></draw:text-box></draw:frame><text:span text:style-name="T6"/></text:p>
      <text:p text:style-name="P9"><text:span text:style-name="T6"/></text:p>
      <text:p text:style-name="P9"><text:span text:style-name="T6">copiar el resultado y pegarlo como valor de JWT_SECRET, dentro del archivo .env.</text:span></text:p>
      <text:p text:style-name="P11"><text:span text:style-name="T7">Despliegue con Docker compose</text:span><text:span text:style-name="T6"> </text:span></text:p>
      <text:p text:style-name="P9"><text:span text:style-name="T6"/></text:p>
      <text:p text:style-name="P24"><text:span text:style-name="T6">Paso 1:</text:span></text:p>
      <text:p text:style-name="P9"><text:span text:style-name="T6"/></text:p>
      <text:p text:style-name="P9"><text:span text:style-name="T6">Construir las imágenes Docker</text:span></text:p>
      <text:p text:style-name="P9"><draw:frame text:anchor-type="paragraph" draw:z-index="10" draw:name="Marco de texto 11" draw:style-name="gr2" draw:text-style-name="P40" svg:width="15.595cm" svg:height="0.786cm" svg:x="-0.042cm" svg:y="0.111cm"><draw:text-box><text:p text:style-name="P39">$ docker compose -build</text:p></draw:text-box></draw:frame><text:span text:style-name="T6"/></text:p>
      <text:p text:style-name="P9"><text:span text:style-name="T6"/></text:p>
      <text:p text:style-name="P9">Este proceso puede tardar unos minutos en la primera ejecución.</text:p>
      <text:p text:style-name="P9"/>
      <text:p text:style-name="P24">Paso 2:</text:p>
      <text:p text:style-name="P9"/>
      <text:p text:style-name="P9">Levantar todos los servicios.</text:p>
      <text:p text:style-name="P9"><draw:frame text:anchor-type="paragraph" draw:z-index="11" draw:name="Marco de texto 12" draw:style-name="gr2" draw:text-style-name="P40" svg:width="15.595cm" svg:height="0.786cm" svg:x="-0.136cm" svg:y="0.171cm"><draw:text-box><text:p text:style-name="P39">$ docker compose up -d</text:p></draw:text-box></draw:frame></text:p>
      <text:p text:style-name="P9"/>
      <text:p text:style-name="P24">Paso 3:</text:p>
      <text:p text:style-name="P9"/>
      <text:p text:style-name="P9">Verificar que los contenedores estén en correcta ejecución.</text:p>
      <text:p text:style-name="P9"/>
      <text:p text:style-name="P9"/>
      <text:p text:style-name="P9">Esto debe mostrarse al ejecutar o anterior:</text:p>
      <text:p text:style-name="P12"><draw:frame text:anchor-type="paragraph" draw:z-index="13" draw:name="Marco de texto 14" draw:style-name="gr2" draw:text-style-name="P40" svg:width="15.595cm" svg:height="2.798cm" svg:x="-0.042cm" svg:y="0.318cm"><draw:text-box><text:p text:style-name="P39">NAME <text:s text:c="19"/>STATUS <text:s text:c="9"/>PORTS</text:p><text:p text:style-name="P39">laesperanza-frontend <text:s text:c="3"/>Up <text:s text:c="13"/>0.0.0.0:80-&gt;80/tcp</text:p><text:p text:style-name="P39">laesperanza-backend <text:s text:c="4"/>Up <text:s text:c="13"/>0.0.0.0:3000-&gt;3000/tcp</text:p><text:p text:style-name="P39">laesperanza-db <text:s text:c="9"/>Up <text:s text:c="13"/>5432/tcp</text:p><text:p text:style-name="P39">laesperanza-nginx <text:s text:c="6"/>Up <text:s text:c="13"/>0.0.0.0:443-&gt;443/tcp</text:p></draw:text-box></draw:frame></text:p>
      <text:p text:style-name="P12"><draw:frame text:anchor-type="paragraph" draw:z-index="12" draw:name="Marco de texto 13" draw:style-name="gr3" draw:text-style-name="P41" svg:width="15.595cm" svg:height="0.84cm" svg:x="-0.042cm" svg:y="-1.889cm"><draw:text-box><text:p>$ docker compose ps</text:p></draw:text-box></draw:frame></text:p>
      <text:p text:style-name="P13"/>
      <text:p text:style-name="P13"/>
      <text:p text:style-name="P13"/>
      <text:p text:style-name="P13"/>
      <text:p text:style-name="P26"/>
      <text:p text:style-name="P26">Paso 4:</text:p>
      <text:p text:style-name="P13"/>
      <text:p text:style-name="P13">Ejecutar las migraciones de base de datos</text:p>
      <text:p text:style-name="P13"/>
      <text:p text:style-name="P13"/>
      <text:p text:style-name="P13"/>
      <text:p text:style-name="P26">Paso 5:</text:p>
      <text:p text:style-name="P13"><draw:frame text:anchor-type="paragraph" draw:z-index="14" draw:name="Marco de texto 15" draw:style-name="gr2" draw:text-style-name="P40" svg:width="15.595cm" svg:height="0.786cm" svg:x="-0.042cm" svg:y="-1.722cm"><draw:text-box><text:p text:style-name="P39">$ docker compose exec backend npx prisma migrate deploy</text:p></draw:text-box></draw:frame><draw:frame text:anchor-type="paragraph" draw:z-index="15" draw:name="Marco de texto 16" draw:style-name="gr2" draw:text-style-name="P40" svg:width="15.595cm" svg:height="0.786cm" svg:x="-0.074cm" svg:y="0.309cm"><draw:text-box><text:p text:style-name="P39">$ docker compose exec backend npm run seed</text:p></draw:text-box></draw:frame></text:p>
      <text:p text:style-name="P13"/>
      <text:p text:style-name="P13"/>
      <text:p text:style-name="P13">Esto creara el catálogo de productos y un usuario administrador inicial.</text:p>
      <text:p text:style-name="P13"/>
      <text:p text:style-name="P27">Verificar la instalación</text:p>
      <text:p text:style-name="P13"/>
      <text:p text:style-name="P26">Verificar el frontend</text:p>
      <text:p text:style-name="P13"/>
      <text:p text:style-name="P13"><draw:frame text:anchor-type="paragraph" draw:z-index="16" draw:name="Marco de texto 17" draw:style-name="gr2" draw:text-style-name="P40" svg:width="15.595cm" svg:height="0.786cm" svg:x="-0.042cm" svg:y="-0.222cm"><draw:text-box><text:p text:style-name="P39">Http://localhost</text:p></draw:text-box></draw:frame></text:p>
      <text:p text:style-name="P13"><text:soft-page-break/></text:p>
      <text:p text:style-name="P13">Al realizar lo anterior debe mostrarse la pantalla de inicio del sistema la esperanza.</text:p>
      <text:p text:style-name="P13"/>
      <text:p text:style-name="P13"/>
      <text:p text:style-name="P13"/>
      <text:p text:style-name="P13"/>
      <text:p text:style-name="P13"/>
      <text:p text:style-name="P26">Verificar el backend</text:p>
      <text:p text:style-name="P13"/>
      <text:p text:style-name="P13">Desde la terminal ejecute lo siguiente:</text:p>
      <text:p text:style-name="P13"/>
      <text:p text:style-name="P13"/>
      <text:p text:style-name="P13">Respuesta esperada: </text:p>
      <text:p text:style-name="P13"/>
      <text:p text:style-name="P13"><draw:frame text:anchor-type="paragraph" draw:z-index="18" draw:name="Marco de texto 19" draw:style-name="gr2" draw:text-style-name="P40" svg:width="15.595cm" svg:height="1.121cm" svg:x="-0.042cm" svg:y="-0.222cm"><draw:text-box><text:p text:style-name="P39">{“sucess”: true, “message”: “API La esperanza funcionando correctamente”, “versión”: “1.0.0” }</text:p></draw:text-box></draw:frame></text:p>
      <text:p text:style-name="P13"><draw:frame text:anchor-type="paragraph" draw:z-index="17" draw:name="Marco de texto 18" draw:style-name="gr2" draw:text-style-name="P40" svg:width="15.595cm" svg:height="0.786cm" svg:x="-0.042cm" svg:y="-2.223cm"><draw:text-box><text:p text:style-name="P39">$ curl http://localhost:3000/api/v1/healtch</text:p></draw:text-box></draw:frame></text:p>
      <text:p text:style-name="P26">Verificar la base de datos</text:p>
      <text:p text:style-name="P13"/>
      <text:p text:style-name="P13"><draw:frame text:anchor-type="paragraph" draw:z-index="19" draw:name="Marco de texto 20" draw:style-name="gr2" draw:text-style-name="P40" svg:width="15.003cm" svg:height="0.786cm" svg:x="-0.072cm" svg:y="-0.09cm"><draw:text-box><text:p text:style-name="P39">$ doker compose exec db psql -U laesperanza_user -d laesperanza_db -c “/dt”</text:p></draw:text-box></draw:frame></text:p>
      <text:p text:style-name="P13"/>
      <text:p text:style-name="P13">Debe listar las 12 tablas del sistema </text:p>
      <text:p text:style-name="P13"/>
      <text:p text:style-name="P27">Comandos para la gestión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31"><text:span text:style-name="T5">Componente</text:span></text:p>
            </table:table-cell>
            <table:table-cell table:style-name="Tabla3.A1" office:value-type="string">
              <text:p text:style-name="P31"><text:span text:style-name="T5">Versión Mínima</text:span></text:p>
            </table:table-cell>
            <table:table-cell table:style-name="Tabla3.A1" office:value-type="string">
              <text:p text:style-name="P31"><text:span text:style-name="T5">Notas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1"><text:span text:style-name="T4">Detener servicios</text:span></text:p>
          </table:table-cell>
          <table:table-cell table:style-name="Tabla3.A2" office:value-type="string">
            <text:p text:style-name="P31"><text:span text:style-name="T4">docker compose stop</text:span></text:p>
          </table:table-cell>
          <table:table-cell table:style-name="Tabla3.A2" office:value-type="string">
            <text:p text:style-name="P31"><text:span text:style-name="T4">Detiene sin eliminar contenedores</text:span></text:p>
          </table:table-cell>
        </table:table-row>
        <table:table-row table:style-name="Tabla3.1">
          <table:table-cell table:style-name="Tabla3.A3" office:value-type="string">
            <text:p text:style-name="P31"><text:span text:style-name="T4">Apagar y limpiar</text:span></text:p>
          </table:table-cell>
          <table:table-cell table:style-name="Tabla3.A3" office:value-type="string">
            <text:p text:style-name="P31"><text:span text:style-name="T4">docker compose down</text:span></text:p>
          </table:table-cell>
          <table:table-cell table:style-name="Tabla3.A3" office:value-type="string">
            <text:p text:style-name="P31"><text:span text:style-name="T4">Elimina contenedores (datos persisten)</text:span></text:p>
          </table:table-cell>
        </table:table-row>
        <table:table-row table:style-name="Tabla3.1">
          <table:table-cell table:style-name="Tabla3.A2" office:value-type="string">
            <text:p text:style-name="P31"><text:span text:style-name="T4">Apagar y borrar datos</text:span></text:p>
          </table:table-cell>
          <table:table-cell table:style-name="Tabla3.A2" office:value-type="string">
            <text:p text:style-name="P31"><text:span text:style-name="T4">docker compose down -v</text:span></text:p>
          </table:table-cell>
          <table:table-cell table:style-name="Tabla3.A2" office:value-type="string">
            <text:p text:style-name="P31"><text:span text:style-name="T4">Elimina también los volúmenes</text:span></text:p>
          </table:table-cell>
        </table:table-row>
        <table:table-row table:style-name="Tabla3.1">
          <table:table-cell table:style-name="Tabla3.A3" office:value-type="string">
            <text:p text:style-name="P31"><text:span text:style-name="T4">Ver logs en tiempo real</text:span></text:p>
          </table:table-cell>
          <table:table-cell table:style-name="Tabla3.A3" office:value-type="string">
            <text:p text:style-name="P31"><text:span text:style-name="T4">docker compose logs -f</text:span></text:p>
          </table:table-cell>
          <table:table-cell table:style-name="Tabla3.A3" office:value-type="string">
            <text:p text:style-name="P31"><text:span text:style-name="T4">Ctrl+C para salir</text:span></text:p>
          </table:table-cell>
        </table:table-row>
        <table:table-row table:style-name="Tabla3.1">
          <table:table-cell table:style-name="Tabla3.A2" office:value-type="string">
            <text:p text:style-name="P31"><text:span text:style-name="T4">Logs de un servicio</text:span></text:p>
          </table:table-cell>
          <table:table-cell table:style-name="Tabla3.A2" office:value-type="string">
            <text:p text:style-name="P31"><text:span text:style-name="T4">docker compose logs -f backend</text:span></text:p>
          </table:table-cell>
          <table:table-cell table:style-name="Tabla3.A2" office:value-type="string">
            <text:p text:style-name="P31"><text:span text:style-name="T4">Reemplazar backend por el servicio deseado</text:span></text:p>
          </table:table-cell>
        </table:table-row>
        <table:table-row table:style-name="Tabla3.1">
          <table:table-cell table:style-name="Tabla3.A3" office:value-type="string">
            <text:p text:style-name="P31"><text:span text:style-name="T4">Reiniciar un servicio</text:span></text:p>
          </table:table-cell>
          <table:table-cell table:style-name="Tabla3.A3" office:value-type="string">
            <text:p text:style-name="P31"><text:span text:style-name="T4">docker compose restart backend</text:span></text:p>
          </table:table-cell>
          <table:table-cell table:style-name="Tabla3.A3" office:value-type="string">
            <text:p text:style-name="P31"><text:span text:style-name="T4">Sin afectar los demás servicios</text:span></text:p>
          </table:table-cell>
        </table:table-row>
        <table:table-row table:style-name="Tabla3.1">
          <table:table-cell table:style-name="Tabla3.A2" office:value-type="string">
            <text:p text:style-name="P31"><text:span text:style-name="T4">Actualizar el sistema</text:span></text:p>
          </table:table-cell>
          <table:table-cell table:style-name="Tabla3.A2" office:value-type="string">
            <text:p text:style-name="P31"><text:span text:style-name="T4">git pull &amp;&amp; docker compose up -d --build</text:span></text:p>
          </table:table-cell>
          <table:table-cell table:style-name="Tabla3.A2" office:value-type="string">
            <text:p text:style-name="P31"><text:span text:style-name="T4">Descarga cambios y reconstruye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Solución de problemas comunes</text:p>
      <text:p text:style-name="P37"/>
      <text:p text:style-name="P36">Puerto 80 en uso</text:p>
      <text:p text:style-name="P38"/>
      <text:p text:style-name="P37">Error bind: adress already in use para el puerto 80</text:p>
      <text:p text:style-name="P37"/>
      <text:p text:style-name="P37">Solución: Identificar y detener el proceso que ocupa el puerto anterior:</text:p>
      <text:p text:style-name="P37"/>
      <text:p text:style-name="P37"><draw:frame text:anchor-type="paragraph" draw:z-index="20" draw:name="Marco de texto 21" draw:style-name="gr1" draw:text-style-name="P40" svg:width="13.759cm" svg:height="2.056cm" svg:x="-0.011cm" svg:y="0.189cm"><draw:text-box><text:p text:style-name="P39">$ sudo lsof -i :80</text:p><text:p text:style-name="P39">$ sudo systemctl stop apache2 <text:s/>(si es Apache)</text:p><text:p text:style-name="P39">$ sudo systemctl stop Nginx <text:s text:c="3"/>(Si es Nginx del host)</text:p></draw:text-box></draw:frame></text:p>
      <text:p text:style-name="P37"/>
      <text:p text:style-name="P32"/>
      <text:p text:style-name="P33"/>
      <text:p text:style-name="P28">La base de datos no iniciales</text:p>
      <text:p text:style-name="P15"/>
      <text:p text:style-name="P15">Si el contenedor laesperanza-db aparece en estado “Exit”, revisar logs:</text:p>
      <text:p text:style-name="P32"><draw:frame text:anchor-type="paragraph" draw:z-index="21" draw:name="Marco de texto 22" draw:style-name="gr1" draw:text-style-name="P40" svg:width="13.449cm" svg:height="2.056cm" svg:x="-0.104cm" svg:y="0.342cm"><draw:text-box><text:p text:style-name="P39">$ docker compose logs db</text:p></draw:text-box></draw:frame></text:p>
      <text:p text:style-name="P32"/>
      <text:p text:style-name="P32"/>
      <text:p text:style-name="P32"/>
      <text:p text:style-name="P32"/>
      <text:p text:style-name="P32"/>
      <text:p text:style-name="P15">Generalmente causado debido a que permisos en volumen o contraseña con caracteres especiales en el .env.</text:p>
      <text:p text:style-name="P32"/>
      <text:p text:style-name="P29">Erro durante las migraciones de prisma</text:p>
      <text:p text:style-name="P32"><draw:frame text:anchor-type="paragraph" draw:z-index="22" draw:name="Marco de texto 23" draw:style-name="gr1" draw:text-style-name="P40" svg:width="13.509cm" svg:height="2.056cm" svg:x="-0.104cm" svg:y="0.185cm"><draw:text-box><text:p text:style-name="P39">$ docker compose exec backend npx prisma migrate reset</text:p><text:p text:style-name="P39">$ docker compose exec backend npx prisma migrate deploy</text:p></draw:text-box></draw:frame></text:p>
      <text:p text:style-name="P32"/>
      <text:p text:style-name="P32"/>
      <text:p text:style-name="P32"/>
      <text:p text:style-name="P32"/>
      <text:p text:style-name="P32"/>
      <text:p text:style-name="P19">El frontend muestra error con conexión de la API</text:p>
      <text:p text:style-name="P32"/>
      <text:p text:style-name="P15">Verificar que la variable “VITE_API_URL”, en el .env apunta a la URL correcta del backend y reconstruir la imagen del frontend:</text:p>
      <text:p text:style-name="P32"/>
      <text:p text:style-name="P32"><draw:frame text:anchor-type="paragraph" draw:z-index="23" draw:name="Marco de texto 24" draw:style-name="gr1" draw:text-style-name="P40" svg:width="13.853cm" svg:height="2.056cm" svg:x="-0.042cm" svg:y="0.081cm"><draw:text-box><text:p text:style-name="P39"><text:span text:style-name="T8">$ docker compose up -d –build frontend</text:span></text:p></draw:text-box></draw:frame></text:p>
      <text:p text:style-name="P32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22:41:03.286706346</meta:creation-date>
    <dc:date>2026-05-21T00:16:15.860274414</dc:date>
    <meta:editing-duration>PT44M9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7" meta:paragraph-count="130" meta:word-count="648" meta:character-count="4027" meta:non-whitespace-character-count="3506"/>
  </office:meta>
</office:document-meta>
</file>